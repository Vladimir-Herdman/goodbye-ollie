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4.4591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4dda8" officeooo:paragraph-rsid="0014dda8"/>
    </style:style>
    <style:style style:name="P11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2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3" style:family="paragraph" style:parent-style-name="Comment">
      <style:paragraph-properties fo:margin-left="0.0398in" fo:margin-right="0.0398in" fo:margin-top="0.039in" fo:margin-bottom="0in" style:line-height-at-least="0.0693in" fo:text-indent="0in" style:text-autospace="none" style:writing-mode="lr-tb"/>
    </style:style>
    <style:style style:name="P14" style:family="paragraph" style:parent-style-name="Text_20_body">
      <style:text-properties officeooo:rsid="0017f519" officeooo:paragraph-rsid="0017f519"/>
    </style:style>
    <style:style style:name="P15" style:family="paragraph" style:parent-style-name="Text_20_body">
      <style:text-properties officeooo:paragraph-rsid="0026bae4"/>
    </style:style>
    <style:style style:name="P16" style:family="paragraph" style:parent-style-name="Text_20_body">
      <style:text-properties officeooo:rsid="002874aa" officeooo:paragraph-rsid="0026bae4"/>
    </style:style>
    <style:style style:name="P17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18" style:family="paragraph" style:parent-style-name="Quote">
      <style:paragraph-properties fo:line-height="100%"/>
      <style:text-properties officeooo:paragraph-rsid="002874aa"/>
    </style:style>
    <style:style style:name="P19" style:family="paragraph" style:parent-style-name="Quote">
      <style:paragraph-properties fo:line-height="100%"/>
    </style:style>
    <style:style style:name="P20" style:family="paragraph" style:parent-style-name="Quote">
      <style:paragraph-properties fo:line-height="100%"/>
      <style:text-properties fo:font-style="normal" officeooo:rsid="00190dea" style:font-style-asian="normal" style:font-style-complex="normal"/>
    </style:style>
    <style:style style:name="P21" style:family="paragraph" style:parent-style-name="Quote">
      <style:paragraph-properties fo:line-height="100%"/>
      <style:text-properties fo:font-style="italic" officeooo:rsid="00190dea" officeooo:paragraph-rsid="003adb42" style:font-style-asian="italic" style:font-style-complex="italic"/>
    </style:style>
    <style:style style:name="P22" style:family="paragraph" style:parent-style-name="Quote">
      <style:paragraph-properties fo:line-height="100%"/>
      <style:text-properties fo:font-style="normal" officeooo:rsid="00190dea" officeooo:paragraph-rsid="003adb42" style:font-style-asian="normal" style:font-style-complex="normal"/>
    </style:style>
    <style:style style:name="P23" style:family="paragraph" style:parent-style-name="Quote">
      <style:paragraph-properties fo:line-height="100%"/>
      <style:text-properties officeooo:paragraph-rsid="0025510a"/>
    </style:style>
    <style:style style:name="P24" style:family="paragraph" style:parent-style-name="Quote">
      <style:paragraph-properties fo:line-height="100%"/>
      <style:text-properties fo:font-style="italic" officeooo:rsid="003adb42" officeooo:paragraph-rsid="003adb42" style:font-style-asian="italic" style:font-style-complex="italic"/>
    </style:style>
    <style:style style:name="P25" style:family="paragraph" style:parent-style-name="Quote">
      <style:paragraph-properties fo:line-height="100%"/>
      <style:text-properties fo:font-style="normal" officeooo:rsid="003adb42" officeooo:paragraph-rsid="003adb42" style:font-style-asian="normal" style:font-style-complex="normal"/>
    </style:style>
    <style:style style:name="P26" style:family="paragraph" style:parent-style-name="Quote">
      <style:paragraph-properties fo:line-height="100%"/>
      <style:text-properties officeooo:paragraph-rsid="002c7ab7"/>
    </style:style>
    <style:style style:name="P27" style:family="paragraph" style:parent-style-name="Comment">
      <style:paragraph-properties style:line-height-at-least="0.0693in" fo:break-before="page"/>
    </style:style>
    <style:style style:name="P28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29" style:family="paragraph" style:parent-style-name="Poetry_20_Text">
      <style:text-properties officeooo:rsid="0038eaff" officeooo:paragraph-rsid="0038eaff"/>
    </style:style>
    <style:style style:name="P30" style:family="paragraph" style:parent-style-name="Poetry_20_Title">
      <style:paragraph-properties fo:break-before="page"/>
      <style:text-properties officeooo:paragraph-rsid="003139c2"/>
    </style:style>
    <style:style style:name="P31" style:family="paragraph" style:parent-style-name="Comment">
      <style:paragraph-properties fo:margin-left="0.0398in" fo:margin-right="0.0398in" fo:margin-top="0.039in" fo:margin-bottom="0in" style:line-height-at-least="0.0693in" fo:text-align="justify" fo:text-indent="0in" style:text-autospace="none" style:writing-mode="lr-tb"/>
    </style:style>
    <style:style style:name="P32" style:family="paragraph" style:parent-style-name="Comment">
      <style:paragraph-properties fo:margin-left="0.0398in" fo:margin-right="0.0398in" fo:margin-top="0.039in" fo:margin-bottom="0in" fo:line-height="100%" fo:text-align="justify" fo:text-indent="0in" style:text-autospace="ideograph-alpha" style:punctuation-wrap="hanging" style:line-break="strict" loext:tab-stop-distance="0in" style:writing-mode="lr-tb" style:writing-mode-automatic="false">
        <style:tab-stops/>
      </style:paragraph-properties>
      <style:text-properties fo:hyphenate="false" loext:hyphenation-no-caps="false" loext:hyphenation-no-last-word="false"/>
    </style:style>
    <style:style style:name="P33" style:family="paragraph" style:parent-style-name="Poetry_20_Title">
      <style:paragraph-properties fo:break-before="page"/>
    </style:style>
    <style:style style:name="P34" style:family="paragraph" style:parent-style-name="Poetry_20_Title">
      <style:paragraph-properties fo:break-before="page"/>
      <style:text-properties officeooo:rsid="0037de52" officeooo:paragraph-rsid="0037de52"/>
    </style:style>
    <style:style style:name="P35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17f519"/>
    </style:style>
    <style:style style:name="T3" style:family="text">
      <style:text-properties style:use-window-font-color="true" loext:opacity="0%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officeooo:rsid="0026bae4"/>
    </style:style>
    <style:style style:name="T5" style:family="text">
      <style:text-properties officeooo:rsid="002874a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0dea" style:font-style-asian="normal" style:font-style-complex="normal"/>
    </style:style>
    <style:style style:name="T8" style:family="text">
      <style:text-properties officeooo:rsid="003adb42"/>
    </style:style>
    <style:style style:name="T9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10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1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2" style:family="text">
      <style:text-properties fo:color="#000000" loext:opacity="100%" style:font-name="Times New Roman" fo:font-size="12pt" fo:letter-spacing="normal" fo:font-style="italic" fo:font-weight="normal" style:font-style-asian="italic" style:font-style-complex="italic" loext:padding="0in" loext:border="none"/>
    </style:style>
    <style:style style:name="T13" style:family="text">
      <style:text-properties officeooo:rsid="002c7ab7"/>
    </style:style>
    <style:style style:name="T14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officeooo:rsid="00218c29"/>
    </style:style>
    <style:style style:name="T18" style:family="text">
      <style:text-properties officeooo:rsid="00216246"/>
    </style:style>
    <style:style style:name="T19" style:family="text">
      <style:text-properties officeooo:rsid="001fea34"/>
    </style:style>
    <style:style style:name="T20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GOODBYE OLLIE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2">Table of </text:span>Contents</text:p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55_3645116443" office:name="poetry title" text:style-name="Index_20_Link" text:visited-style-name="Index_20_Link">poetry title<text:tab/>1</text:a></text:p>
        </text:index-body>
      </text:table-of-content>
      <text:p text:style-name="P10"/>
      <text:p text:style-name="P11"/>
      <text:p text:style-name="P12"><office:annotation office:name="__Annotation__437_3516834471" loext:resolved="false"><dc:creator>Vladimir Herdman</dc:creator><dc:date>2026-05-09T23:05:56.863771000</dc:date><meta:creator-initials>VTH</meta:creator-initials><text:p text:style-name="P13"><text:span text:style-name="T3">It’s pretty bad make it better. You’re emo too much lately do better man.</text:span></text:p><text:p text:style-name="P13"><text:span text:style-name="T3"/></text:p></office:annotation>Preface<office:annotation-end office:name="__Annotation__437_3516834471"/></text:p>
      <text:p text:style-name="P14"/>
      <text:p text:style-name="P15"><text:span text:style-name="T4">There’s something wrong with wanting to be an individual. I’ve come to this conclusion through careful living and extended time around people who laugh when I do, but don’t share the same interests as </text:span><office:annotation office:name="__Annotation__416_2779579312" loext:resolved="false"><dc:creator>Vladimir Herdman</dc:creator><dc:date>2026-05-09T23:31:15.483613000</dc:date><meta:creator-initials>VTH</meta:creator-initials><text:p text:style-name="Comment">I’m only really comfortable around friends and myself. I’m sorry for the clowning, I’m sorry for how I act, I’m sorry I’m sorry.</text:p><text:p text:style-name="Comment"/></office:annotation><text:span text:style-name="T4">me. I’v</text:span><text:span text:style-name="T5">e realized</text:span><office:annotation-end office:name="__Annotation__416_2779579312"/><text:span text:style-name="T5"> how I act is an issue, and that my friends are all I’m comfortable around.</text:span></text:p>
      <text:p text:style-name="P16"/>
      <text:p text:style-name="P17"/>
      <text:p text:style-name="P7"/>
      <text:p text:style-name="Text_20_body"/>
      <text:p text:style-name="Text_20_body"/>
      <text:p text:style-name="Text_20_body"/>
      <text:p text:style-name="P18">I aint ever felt better and</text:p>
      <text:p text:style-name="P18">I aint ever been dumbe<text:span text:style-name="T1">r.</text:span></text:p>
      <text:p text:style-name="P19"><text:span text:style-name="T6">—</text:span><text:span text:style-name="T7">Jesse Welles</text:span></text:p>
      <text:p text:style-name="P20"/>
      <text:p text:style-name="P21">To give anything less than your best</text:p>
      <text:p text:style-name="P21">is to sacrifice the gift.</text:p>
      <text:p text:style-name="P22">—<text:span text:style-name="T8">Steve Prefontaine</text:span></text:p>
      <text:p text:style-name="P19"/>
      <text:p text:style-name="P23"><text:span text:style-name="Emphasis">I can’t even guess myself what it must be</text:span></text:p>
      <text:p text:style-name="P23"><text:span text:style-name="Emphasis">to live the life of a human being.</text:span></text:p>
      <text:p text:style-name="P19"><text:span text:style-name="Emphasis"><text:span text:style-name="T9">—</text:span></text:span><text:span text:style-name="Emphasis"><text:span text:style-name="T10">Osamu Dazai, </text:span></text:span><text:span text:style-name="Emphasis"><text:span text:style-name="T11">No Longer Human</text:span></text:span></text:p>
      <text:p text:style-name="P19"><text:span text:style-name="Emphasis"><text:span text:style-name="T11"/></text:span></text:p>
      <text:p text:style-name="P24">See the cat?</text:p>
      <text:p text:style-name="P25"><text:span text:style-name="Emphasis"><text:span text:style-name="T12">See the cradle?</text:span></text:span></text:p>
      <text:p text:style-name="P25"><text:span text:style-name="Emphasis"><text:span text:style-name="T9">—Kurt Vonnegut, Jr., </text:span></text:span><text:span text:style-name="Emphasis"><text:span text:style-name="T12">Cat’s Cradle</text:span></text:span></text:p>
      <text:p text:style-name="P19"><text:span text:style-name="Emphasis"><text:span text:style-name="T10"/></text:span></text:p>
      <text:p text:style-name="P26"><text:span text:style-name="Emphasis"><text:span text:style-name="T13">I don’t want to be normal,</text:span></text:span></text:p>
      <text:p text:style-name="P26"><text:span text:style-name="Emphasis"><text:span text:style-name="T13">I want to be me</text:span></text:span><text:span text:style-name="Emphasis">.</text:span></text:p>
      <text:p text:style-name="P26"><text:span text:style-name="Emphasis"><text:span text:style-name="T10">—</text:span></text:span><text:span text:style-name="Emphasis"><text:span text:style-name="T14">My Brain</text:span></text:span></text:p>
      <text:p text:style-name="P27" loext:marker-style-name="T15"><text:span text:style-name="T15"/></text:p>
      <text:p text:style-name="Text_20_body"/>
      <text:p text:style-name="P28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Poetry_20_Text"/>
      <text:p text:style-name="P29">words</text:p>
      <text:p text:style-name="P29"/>
      <text:p text:style-name="P29">Sincerely,</text:p>
      <text:p text:style-name="P29">Vova</text:p>
      <text:p text:style-name="P30"><office:annotation office:name="__Annotation__434_3516834471" loext:resolved="false"><dc:creator>Vladimir Herdman</dc:creator><dc:date>2026-05-09T23:02:11.382157000</dc:date><meta:creator-initials>VTH</meta:creator-initials><text:p text:style-name="P31"><text:span text:style-name="T16">Base off an actual photo of paint splatter or something, people are getting tree/person, and not the intended splatter text effect.</text:span></text:p><text:p text:style-name="P32"><text:span text:style-name="T16"/></text:p></office:annotation>What Have I Done<office:annotation-end office:name="__Annotation__434_3516834471"/></text:p>
      <text:p text:style-name="Poetry_20_Text"/>
      <text:p text:style-name="Poetry_20_Text"><text:s text:c="4"/><text:span text:style-name="T17">to o</text:span> <text:s text:c="72"/><text:span text:style-name="T18">m</text:span></text:p>
      <text:p text:style-name="Poetry_20_Text"><text:span text:style-name="T17">fa t</text:span> <text:s text:c="5"/><text:span text:style-name="T17">a</text:span> <text:s text:c="66"/><text:span text:style-name="T18">y</text:span></text:p>
      <text:p text:style-name="Poetry_20_Text"><text:s text:c="2"/><text:span text:style-name="T17">l</text:span> <text:s text:c="69"/><text:span text:style-name="T18">he <text:s text:c="9"/>l</text:span></text:p>
      <text:p text:style-name="Poetry_20_Text"><text:s text:c="4"/><text:span text:style-name="T17">o</text:span> <text:s text:c="71"/><text:span text:style-name="T18">a <text:s text:c="9"/>a</text:span></text:p>
      <text:p text:style-name="Poetry_20_Text"><text:s text:c="2"/><text:span text:style-name="T17">a</text:span> <text:s text:c="70"/><text:span text:style-name="T18">r <text:s text:c="11"/>s</text:span></text:p>
      <text:p text:style-name="Poetry_20_Text"><text:s text:c="5"/><text:span text:style-name="T17">d</text:span> <text:s text:c="66"/><text:span text:style-name="T18">t <text:s text:c="15"/>t</text:span></text:p>
      <text:p text:style-name="Poetry_20_Text"><text:s text:c="56"/><text:span text:style-name="T18">y <text:s/>go <text:s text:c="28"/></text:span><text:span text:style-name="T17">c</text:span></text:p>
      <text:p text:style-name="Poetry_20_Text"><text:s text:c="21"/><text:span text:style-name="T18">I</text:span> <text:s text:c="24"/><text:span text:style-name="T18">h <text:s/>m <text:s text:c="10"/>d <text:s text:c="26"/>h</text:span></text:p>
      <text:p text:style-name="Poetry_20_Text"><text:s text:c="14"/><text:span text:style-name="T18">e</text:span> <text:s text:c="8"/><text:span text:style-name="T18">od</text:span> <text:s/><text:span text:style-name="T18">t</text:span> <text:s text:c="12"/><text:span text:style-name="T18">o <text:s text:c="43"/>a hn</text:span></text:p>
      <text:p text:style-name="Poetry_20_Text"><text:s text:c="12"/><text:span text:style-name="T18">ev</text:span> <text:s text:c="17"/><text:span text:style-name="T18">ah</text:span> <text:s text:c="33"/><text:span text:style-name="T18">I <text:s text:c="20"/>c <text:s/>e</text:span></text:p>
      <text:p text:style-name="Poetry_20_Text"><text:s text:c="9"/><text:span text:style-name="T18">n</text:span> <text:s text:c="24"/><text:span text:style-name="T18">w</text:span> <text:s text:c="33"/><text:span text:style-name="T18">ca</text:span></text:p>
      <text:p text:style-name="Poetry_20_Text"><text:s text:c="5"/><text:span text:style-name="T18">sa</text:span> <text:s text:c="32"/>w <text:s text:c="29"/><text:span text:style-name="T18">n</text:span></text:p>
      <text:p text:style-name="Poetry_20_Text"><text:s text:c="9"/><text:span text:style-name="T18">y</text:span> <text:s text:c="29"/>e <text:s text:c="37"/><text:span text:style-name="T18">t</text:span></text:p>
      <text:p text:style-name="Poetry_20_Text"><text:s text:c="40"/></text:p>
      <text:p text:style-name="Poetry_20_Text"><text:s text:c="41"/>t <text:s text:c="34"/><text:span text:style-name="T18">fe</text:span></text:p>
      <text:p text:style-name="Poetry_20_Text"><text:s text:c="43"/>a <text:s text:c="35"/><text:span text:style-name="T18">el m</text:span></text:p>
      <text:p text:style-name="Poetry_20_Text"><text:s text:c="45"/>n <text:s text:c="36"/><text:span text:style-name="T18">y l</text:span></text:p>
      <text:p text:style-name="Poetry_20_Text"><text:s text:c="44"/>d <text:s text:c="38"/><text:span text:style-name="T18">e</text:span></text:p>
      <text:p text:style-name="Poetry_20_Text"><text:s text:c="45"/>d <text:s text:c="37"/><text:span text:style-name="T18">g</text:span></text:p>
      <text:p text:style-name="Poetry_20_Text"><text:s text:c="44"/>r</text:p>
      <text:p text:style-name="Poetry_20_Text"><text:s text:c="45"/>i</text:p>
      <text:p text:style-name="Poetry_20_Text"><text:s text:c="46"/>pi n</text:p>
      <text:p text:style-name="Poetry_20_Text"><text:s text:c="50"/>g d o</text:p>
      <text:p text:style-name="Poetry_20_Text"><text:s text:c="41"/><text:span text:style-name="T18">o</text:span> <text:s text:c="11"/>w</text:p>
      <text:p text:style-name="Poetry_20_Text"><text:s text:c="37"/><text:span text:style-name="T18">n</text:span> <text:s text:c="16"/>n th e</text:p>
      <text:p text:style-name="Poetry_20_Text"><text:s text:c="29"/><text:span text:style-name="T18">to</text:span> <text:s text:c="29"/>p</text:p>
      <text:p text:style-name="Poetry_20_Text"><text:s text:c="23"/><text:span text:style-name="T18">th</text:span> <text:s text:c="34"/>a <text:s/>g</text:p>
      <text:p text:style-name="Poetry_20_Text"><text:s text:c="22"/><text:span text:style-name="T18">e</text:span> <text:s text:c="35"/>e <text:s text:c="7"/><text:span text:style-name="T19">a <text:s text:c="4"/>t <text:s text:c="5"/>s e <text:s text:c="2"/>e</text:span></text:p>
      <text:p text:style-name="Poetry_20_Text"><text:s text:c="16"/><text:span text:style-name="T18">flo <text:s/>or</text:span> <text:s text:c="26"/><text:span text:style-name="T19">f or <text:s text:c="7"/>l <text:s text:c="2"/>l <text:s text:c="4"/>o <text:s text:c="5"/>m y <text:s text:c="2"/>sh a <text:s/>me</text:span></text:p>
      <text:p text:style-name="P33">Be Normal</text:p>
      <text:p text:style-name="Poetry_20_Text"/>
      <text:p text:style-name="Poetry_20_Text">I don’t want to be normal,</text:p>
      <text:p text:style-name="Poetry_20_Text">I want to be me.</text:p>
      <text:p text:style-name="Poetry_20_Text"/>
      <text:p text:style-name="Poetry_20_Text">Isn’t that enough?</text:p>
      <text:p text:style-name="P34">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Vova<text:span text:style-name="T20"> </text:span>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33">Goodbye Ollie,</text:p>
      <text:p text:style-name="P35"/>
      <text:p text:style-name="Poetry_20_Text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oetry_20_Text"/>
      <text:p text:style-name="Poetry_20_Text">Maybe I’m not all that afraid of being unable to express myself, but that there’s nothing to express. I’m afraid of being nothing, that I have no dramatic knots in my living cords.</text:p>
      <text:p text:style-name="Poetry_20_Text"/>
      <text:p text:style-name="Poetry_20_Text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oetry_20_Text"/>
      <text:p text:style-name="Poetry_20_Text">Sincerely,</text:p>
      <text:p text:style-name="Poetry_20_Text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Poetry_20_Text" style:display-name="Poetry Text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18"/><text:bookmark text:name="PageNumWizard_HEADER_Frontmatter-numbered5 Copy 5 Copy 16"/><text:bookmark text:name="PageNumWizard_HEADER_Frontmatter-numbered5 Copy 5 Copy 14"/><text:bookmark text:name="PageNumWizard_HEADER_Frontmatter-numbered5 Copy 5 Copy 12"/><text:bookmark text:name="PageNumWizard_HEADER_Frontmatter-numbered5 Copy 5 Copy 10"/><text:bookmark text:name="PageNumWizard_HEADER_Frontmatter-numbered5 Copy 5 Copy 8"/><text:bookmark text:name="PageNumWizard_HEADER_Frontmatter-numbered5 Copy 5 Copy 6"/><text:bookmark text:name="PageNumWizard_HEADER_Frontmatter-numbered5 Copy 5 Copy 4"/><text:bookmark text:name="PageNumWizard_HEADER_Frontmatter-numbered5 Copy 5 Copy 2"/><text:bookmark text:name="PageNumWizard_HEADER_Frontmatter-numbered6 Copy 5"/><text:bookmark text:name="PageNumWizard_HEADER_Frontmatter-numbered5 Copy 5 Copy 1"/><text:bookmark text:name="PageNumWizard_HEADER_Frontmatter-numbered5 Copy 5 Copy 3"/><text:bookmark text:name="PageNumWizard_HEADER_Frontmatter-numbered5 Copy 5 Copy 5"/><text:bookmark text:name="PageNumWizard_HEADER_Frontmatter-numbered5 Copy 5 Copy 7"/><text:bookmark text:name="PageNumWizard_HEADER_Frontmatter-numbered5 Copy 5 Copy 9"/><text:bookmark text:name="PageNumWizard_HEADER_Frontmatter-numbered5 Copy 5 Copy 11"/><text:bookmark text:name="PageNumWizard_HEADER_Frontmatter-numbered5 Copy 5 Copy 13"/><text:bookmark text:name="PageNumWizard_HEADER_Frontmatter-numbered5 Copy 5 Copy 15"/><text:bookmark text:name="PageNumWizard_HEADER_Frontmatter-numbered5 Copy 5 Copy 17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5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4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5-23T21:55:16.492122000</dc:date>
    <meta:editing-duration>PT1H37M39S</meta:editing-duration>
    <meta:editing-cycles>32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5" meta:paragraph-count="102" meta:word-count="785" meta:character-count="6045" meta:non-whitespace-character-count="3365"/>
  </office:meta>
</office:document-meta>
</file>