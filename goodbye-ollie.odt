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rontmatter">
      <style:paragraph-properties fo:text-align="center" style:justify-single-word="false" style:page-number="auto"/>
      <style:text-properties officeooo:rsid="0011bcbf" officeooo:paragraph-rsid="0011bcbf"/>
    </style:style>
    <style:style style:name="P2" style:family="paragraph" style:parent-style-name="Standard">
      <style:paragraph-properties fo:text-align="justify" style:justify-single-word="false" fo:break-before="page"/>
      <style:text-properties officeooo:rsid="0011bcbf" officeooo:paragraph-rsid="0011bcbf"/>
    </style:style>
    <style:style style:name="P3" style:family="paragraph" style:parent-style-name="Standard">
      <style:paragraph-properties fo:text-align="justify" style:justify-single-word="false"/>
      <style:text-properties officeooo:rsid="0011bcbf" officeooo:paragraph-rsid="0011bcbf"/>
    </style:style>
    <style:style style:name="P4" style:family="paragraph" style:parent-style-name="Standard">
      <style:paragraph-properties fo:text-align="justify" style:justify-single-word="false"/>
      <style:text-properties fo:font-size="32pt" fo:font-weight="bold" officeooo:rsid="0011bcbf" officeooo:paragraph-rsid="0011bcbf"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11bcbf" officeooo:paragraph-rsid="0011bcbf"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6pt" fo:font-style="italic" officeooo:rsid="0011bcbf" officeooo:paragraph-rsid="0011bcbf" style:font-size-asian="16pt" style:font-style-asian="italic" style:font-size-complex="16pt" style:font-style-complex="italic"/>
    </style:style>
    <style:style style:name="P7" style:family="paragraph" style:parent-style-name="Text_20_body">
      <style:paragraph-properties fo:break-before="page"/>
      <style:text-properties officeooo:rsid="0014dda8" officeooo:paragraph-rsid="0014dda8"/>
    </style:style>
    <style:style style:name="P8" style:family="paragraph" style:parent-style-name="Text_20_body">
      <style:paragraph-properties fo:break-before="page"/>
      <style:text-properties officeooo:paragraph-rsid="0014dda8"/>
    </style:style>
    <style:style style:name="P9" style:family="paragraph" style:parent-style-name="Contents_20_1">
      <style:paragraph-properties>
        <style:tab-stops>
          <style:tab-stop style:position="0in"/>
        </style:tab-stops>
      </style:paragraph-properties>
    </style:style>
    <style:style style:name="P10" style:family="paragraph" style:parent-style-name="Contents_20_2">
      <style:paragraph-properties>
        <style:tab-stops>
          <style:tab-stop style:position="0in"/>
        </style:tab-stops>
      </style:paragraph-properties>
    </style:style>
    <style:style style:name="P11" style:family="paragraph" style:parent-style-name="Text_20_body">
      <style:text-properties officeooo:rsid="0014dda8" officeooo:paragraph-rsid="0014dda8"/>
    </style:style>
    <style:style style:name="P12" style:family="paragraph" style:parent-style-name="Text_20_body" style:master-page-name="Frontmatter">
      <style:paragraph-properties style:page-number="auto" fo:break-before="page"/>
      <style:text-properties officeooo:rsid="0017f519" officeooo:paragraph-rsid="0014dda8"/>
    </style:style>
    <style:style style:name="P13" style:family="paragraph" style:parent-style-name="Non-Poetry_20_Title" style:master-page-name="Frontmatter-numbered">
      <style:paragraph-properties style:page-number="auto" fo:break-before="page"/>
    </style:style>
    <style:style style:name="P14" style:family="paragraph" style:parent-style-name="Text_20_body">
      <style:paragraph-properties fo:line-height="100%"/>
      <style:text-properties officeooo:rsid="0017f519" officeooo:paragraph-rsid="0017f519"/>
    </style:style>
    <style:style style:name="P15" style:family="paragraph" style:parent-style-name="Text_20_body">
      <style:text-properties officeooo:rsid="003cfd76" officeooo:paragraph-rsid="003cfd76"/>
    </style:style>
    <style:style style:name="P16" style:family="paragraph" style:parent-style-name="Text_20_body">
      <style:text-properties officeooo:paragraph-rsid="0026bae4"/>
    </style:style>
    <style:style style:name="P17" style:family="paragraph" style:parent-style-name="Text_20_body">
      <style:text-properties officeooo:rsid="003d6ea7" officeooo:paragraph-rsid="003d6ea7"/>
    </style:style>
    <style:style style:name="P18" style:family="paragraph" style:parent-style-name="Text_20_body">
      <style:text-properties officeooo:paragraph-rsid="003d6ea7"/>
    </style:style>
    <style:style style:name="P19" style:family="paragraph" style:parent-style-name="Text_20_body">
      <style:text-properties officeooo:paragraph-rsid="003eb0bf"/>
    </style:style>
    <style:style style:name="P20" style:family="paragraph" style:parent-style-name="Text_20_body">
      <style:text-properties officeooo:rsid="003eb0bf" officeooo:paragraph-rsid="003eb0bf"/>
    </style:style>
    <style:style style:name="P21" style:family="paragraph" style:parent-style-name="Text_20_body" style:master-page-name="Frontmatter">
      <style:paragraph-properties style:page-number="auto" fo:break-before="page"/>
      <style:text-properties officeooo:rsid="0014dda8" officeooo:paragraph-rsid="0014dda8"/>
    </style:style>
    <style:style style:name="P22" style:family="paragraph" style:parent-style-name="Quote">
      <style:paragraph-properties fo:line-height="100%"/>
      <style:text-properties officeooo:paragraph-rsid="002874aa"/>
    </style:style>
    <style:style style:name="P23" style:family="paragraph" style:parent-style-name="Quote">
      <style:paragraph-properties fo:line-height="100%"/>
    </style:style>
    <style:style style:name="P24" style:family="paragraph" style:parent-style-name="Quote">
      <style:paragraph-properties fo:line-height="100%"/>
      <style:text-properties fo:font-style="normal" officeooo:rsid="00190dea" style:font-style-asian="normal" style:font-style-complex="normal"/>
    </style:style>
    <style:style style:name="P25" style:family="paragraph" style:parent-style-name="Quote">
      <style:paragraph-properties fo:line-height="100%"/>
      <style:text-properties fo:font-style="italic" officeooo:rsid="00190dea" officeooo:paragraph-rsid="003adb42" style:font-style-asian="italic" style:font-style-complex="italic"/>
    </style:style>
    <style:style style:name="P26" style:family="paragraph" style:parent-style-name="Quote">
      <style:paragraph-properties fo:line-height="100%"/>
      <style:text-properties fo:font-style="normal" officeooo:rsid="00190dea" officeooo:paragraph-rsid="003adb42" style:font-style-asian="normal" style:font-style-complex="normal"/>
    </style:style>
    <style:style style:name="P27" style:family="paragraph" style:parent-style-name="Quote">
      <style:paragraph-properties fo:line-height="100%"/>
      <style:text-properties officeooo:paragraph-rsid="0025510a"/>
    </style:style>
    <style:style style:name="P28" style:family="paragraph" style:parent-style-name="Quote">
      <style:paragraph-properties fo:line-height="100%"/>
      <style:text-properties fo:font-style="italic" officeooo:rsid="003adb42" officeooo:paragraph-rsid="003adb42" style:font-style-asian="italic" style:font-style-complex="italic"/>
    </style:style>
    <style:style style:name="P29" style:family="paragraph" style:parent-style-name="Quote">
      <style:paragraph-properties fo:line-height="100%"/>
      <style:text-properties fo:font-style="normal" officeooo:rsid="003adb42" officeooo:paragraph-rsid="003adb42" style:font-style-asian="normal" style:font-style-complex="normal"/>
    </style:style>
    <style:style style:name="P30" style:family="paragraph" style:parent-style-name="Quote">
      <style:paragraph-properties fo:line-height="100%"/>
      <style:text-properties officeooo:paragraph-rsid="002c7ab7"/>
    </style:style>
    <style:style style:name="P31" style:family="paragraph" style:parent-style-name="Comment">
      <style:paragraph-properties style:line-height-at-least="0.0693in" fo:break-before="page"/>
    </style:style>
    <style:style style:name="P32" style:family="paragraph" style:parent-style-name="Poetry_20_Title" style:master-page-name="Poetry">
      <style:paragraph-properties style:page-number="1" fo:break-before="page"/>
      <style:text-properties fo:font-size="16pt" officeooo:rsid="002c7ab7" officeooo:paragraph-rsid="002c7ab7" style:font-size-asian="16pt" style:font-size-complex="16pt"/>
    </style:style>
    <style:style style:name="P33" style:family="paragraph" style:parent-style-name="Poetry_20_Text">
      <style:text-properties officeooo:rsid="0038eaff" officeooo:paragraph-rsid="0038eaff"/>
    </style:style>
    <style:style style:name="P34" style:family="paragraph" style:parent-style-name="Poetry_20_Title">
      <style:paragraph-properties fo:break-before="page"/>
    </style:style>
    <style:style style:name="P35" style:family="paragraph" style:parent-style-name="Poetry_20_Text">
      <style:text-properties officeooo:rsid="005eca10" officeooo:paragraph-rsid="005eca10"/>
    </style:style>
    <style:style style:name="P36" style:family="paragraph" style:parent-style-name="Poetry_20_Title">
      <style:paragraph-properties fo:break-before="page"/>
      <style:text-properties officeooo:rsid="005eca10" officeooo:paragraph-rsid="005eca10"/>
    </style:style>
    <style:style style:name="P37" style:family="paragraph" style:parent-style-name="Poetry_20_Title">
      <style:paragraph-properties fo:break-before="page"/>
      <style:text-properties officeooo:paragraph-rsid="00491cb3"/>
    </style:style>
    <style:style style:name="P38" style:family="paragraph" style:parent-style-name="Poetry_20_Text">
      <style:text-properties officeooo:paragraph-rsid="00491cb3"/>
    </style:style>
    <style:style style:name="P39" style:family="paragraph" style:parent-style-name="Poetry_20_Text">
      <style:text-properties officeooo:rsid="00491cb3" officeooo:paragraph-rsid="00491cb3"/>
    </style:style>
    <style:style style:name="P40" style:family="paragraph" style:parent-style-name="Poetry_20_Text">
      <style:text-properties officeooo:rsid="004069c6" officeooo:paragraph-rsid="004069c6"/>
    </style:style>
    <style:style style:name="P41" style:family="paragraph" style:parent-style-name="Poetry_20_Title">
      <style:paragraph-properties fo:break-before="page"/>
      <style:text-properties officeooo:rsid="0037de52" officeooo:paragraph-rsid="0037de52"/>
    </style:style>
    <style:style style:name="P42" style:family="paragraph" style:parent-style-name="Poetry_20_Text">
      <style:text-properties officeooo:rsid="004a6587" officeooo:paragraph-rsid="004a6587"/>
    </style:style>
    <style:style style:name="P43" style:family="paragraph" style:parent-style-name="Poetry_20_Text">
      <style:text-properties officeooo:rsid="004a6587" officeooo:paragraph-rsid="004bc2cc"/>
    </style:style>
    <style:style style:name="P44" style:family="paragraph" style:parent-style-name="Poetry_20_Text">
      <style:text-properties officeooo:rsid="004bc2cc" officeooo:paragraph-rsid="004bc2cc"/>
    </style:style>
    <style:style style:name="P45" style:family="paragraph" style:parent-style-name="Poetry_20_Text">
      <style:paragraph-properties fo:margin-top="0in" fo:margin-bottom="0.1965in" style:contextual-spacing="false"/>
      <style:text-properties officeooo:rsid="004bc2cc" officeooo:paragraph-rsid="004bc2cc"/>
    </style:style>
    <style:style style:name="P46" style:family="paragraph" style:parent-style-name="Poetry_20_Text">
      <style:text-properties officeooo:rsid="005127df" officeooo:paragraph-rsid="005127df"/>
    </style:style>
    <style:style style:name="P47" style:family="paragraph" style:parent-style-name="Poetry_20_Text">
      <style:text-properties officeooo:rsid="00527118" officeooo:paragraph-rsid="00527118"/>
    </style:style>
    <style:style style:name="P48" style:family="paragraph" style:parent-style-name="Poetry_20_Text">
      <style:text-properties officeooo:rsid="00527118" officeooo:paragraph-rsid="00598d06"/>
    </style:style>
    <style:style style:name="P49" style:family="paragraph" style:parent-style-name="Poetry_20_Text">
      <style:text-properties officeooo:rsid="00598d06" officeooo:paragraph-rsid="00598d06"/>
    </style:style>
    <style:style style:name="P50" style:family="paragraph" style:parent-style-name="Poetry_20_Text" style:master-page-name="">
      <loext:graphic-properties draw:fill="none"/>
      <style:paragraph-properties fo:margin-left="0.5in" fo:margin-right="0in" fo:margin-top="0in" fo:margin-bottom="0in" style:contextual-spacing="false" fo:line-height="115%" fo:text-align="justify" style:justify-single-word="false" fo:text-indent="0in" style:auto-text-indent="false" style:page-number="auto" fo:background-color="transparent">
        <style:tab-stops>
          <style:tab-stop style:position="0.4335in"/>
          <style:tab-stop style:position="1.4957in"/>
          <style:tab-stop style:position="2.3626in"/>
        </style:tab-stops>
      </style:paragraph-properties>
    </style:style>
    <style:style style:name="P51" style:family="paragraph" style:parent-style-name="Poetry_20_Text">
      <loext:graphic-properties draw:fill="none"/>
      <style:paragraph-properties fo:margin-left="0.5in" fo:margin-right="0in" fo:margin-top="0in" fo:margin-bottom="0in" style:contextual-spacing="false" fo:line-height="115%" fo:text-align="justify" style:justify-single-word="false" fo:text-indent="0in" style:auto-text-indent="false" fo:background-color="transparent">
        <style:tab-stops>
          <style:tab-stop style:position="0.4335in"/>
          <style:tab-stop style:position="1.4957in"/>
          <style:tab-stop style:position="2.3626in"/>
        </style:tab-stops>
      </style:paragraph-properties>
    </style:style>
    <style:style style:name="P52" style:family="paragraph" style:parent-style-name="Poetry_20_Text">
      <style:text-properties officeooo:paragraph-rsid="005a4153"/>
    </style:style>
    <style:style style:name="P53" style:family="paragraph" style:parent-style-name="Poetry_20_Text">
      <style:text-properties officeooo:rsid="005b9724" officeooo:paragraph-rsid="005b9724"/>
    </style:style>
    <style:style style:name="P54" style:family="paragraph" style:parent-style-name="Poetry_20_Text">
      <style:text-properties officeooo:rsid="00586a04" officeooo:paragraph-rsid="00586a04"/>
    </style:style>
    <style:style style:name="P55" style:family="paragraph" style:parent-style-name="Poetry_20_Title">
      <style:paragraph-properties fo:break-before="page"/>
      <style:text-properties officeooo:paragraph-rsid="005eca10"/>
    </style:style>
    <style:style style:name="P56" style:family="paragraph" style:parent-style-name="Poetry_20_Text">
      <style:text-properties officeooo:rsid="005dab1a" officeooo:paragraph-rsid="005eca10"/>
    </style:style>
    <style:style style:name="P57"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25510a" officeooo:paragraph-rsid="0025510a"/>
    </style:style>
    <style:style style:name="T1" style:family="text">
      <style:text-properties officeooo:rsid="00197293"/>
    </style:style>
    <style:style style:name="T2" style:family="text">
      <style:text-properties officeooo:rsid="003d6ea7"/>
    </style:style>
    <style:style style:name="T3" style:family="text">
      <style:text-properties fo:font-style="normal" officeooo:rsid="003cfd76" style:font-style-asian="normal" style:font-style-complex="normal"/>
    </style:style>
    <style:style style:name="T4" style:family="text">
      <style:text-properties fo:font-style="normal" officeooo:rsid="003d6ea7" style:font-style-asian="normal" style:font-style-complex="normal"/>
    </style:style>
    <style:style style:name="T5" style:family="text">
      <style:text-properties officeooo:rsid="006137f6"/>
    </style:style>
    <style:style style:name="T6" style:family="text">
      <style:text-properties officeooo:rsid="003eb0bf"/>
    </style:style>
    <style:style style:name="T7" style:family="text">
      <style:text-properties officeooo:rsid="0026bae4"/>
    </style:style>
    <style:style style:name="T8" style:family="text">
      <style:text-properties officeooo:rsid="003cfd76"/>
    </style:style>
    <style:style style:name="T9" style:family="text">
      <style:text-properties fo:font-style="normal" style:font-style-asian="normal" style:font-style-complex="normal"/>
    </style:style>
    <style:style style:name="T10" style:family="text">
      <style:text-properties fo:font-style="normal" officeooo:rsid="00190dea" style:font-style-asian="normal" style:font-style-complex="normal"/>
    </style:style>
    <style:style style:name="T11" style:family="text">
      <style:text-properties officeooo:rsid="003adb42"/>
    </style:style>
    <style:style style:name="T12" style:family="text">
      <style:text-properties fo:color="#000000" loext:opacity="100%" style:font-name="Times New Roman" fo:font-size="12pt" fo:letter-spacing="normal" fo:font-style="normal" fo:font-weight="normal" style:font-style-asian="normal" style:font-style-complex="normal" loext:padding="0in" loext:border="none"/>
    </style:style>
    <style:style style:name="T13" style:family="text">
      <style:text-properties fo:color="#000000" loext:opacity="100%" style:font-name="Times New Roman" fo:font-size="12pt" fo:letter-spacing="normal" fo:font-style="normal" fo:font-weight="normal" officeooo:rsid="0025510a" style:font-style-asian="normal" style:font-style-complex="normal" loext:padding="0in" loext:border="none"/>
    </style:style>
    <style:style style:name="T14" style:family="text">
      <style:text-properties fo:color="#000000" loext:opacity="100%" style:font-name="Times New Roman" fo:font-size="12pt" fo:letter-spacing="normal" fo:font-style="italic" fo:font-weight="normal" officeooo:rsid="0030af39" style:font-style-asian="italic" style:font-style-complex="italic" loext:padding="0in" loext:border="none"/>
    </style:style>
    <style:style style:name="T15" style:family="text">
      <style:text-properties fo:color="#000000" loext:opacity="100%" style:font-name="Times New Roman" fo:font-size="12pt" fo:letter-spacing="normal" fo:font-style="italic" fo:font-weight="normal" style:font-style-asian="italic" style:font-style-complex="italic" loext:padding="0in" loext:border="none"/>
    </style:style>
    <style:style style:name="T16" style:family="text">
      <style:text-properties officeooo:rsid="002c7ab7"/>
    </style:style>
    <style:style style:name="T17" style:family="text">
      <style:text-properties fo:color="#000000" loext:opacity="100%" style:font-name="Times New Roman" fo:font-size="12pt" fo:letter-spacing="normal" fo:font-style="normal" fo:font-weight="normal" officeooo:rsid="002c7ab7" style:font-style-asian="normal" style:font-style-complex="normal" loext:padding="0in" loext:border="none"/>
    </style:style>
    <style:style style:name="T18" style:family="text">
      <style:text-properties fo:font-style="normal" fo:font-weight="normal" style:font-style-asian="normal" style:font-weight-asian="normal"/>
    </style:style>
    <style:style style:name="T19" style:family="text">
      <style:text-properties officeooo:rsid="004382b0"/>
    </style:style>
    <style:style style:name="T20" style:family="text">
      <style:text-properties officeooo:rsid="00491cb3"/>
    </style:style>
    <style:style style:name="T21" style:family="text">
      <style:text-properties fo:font-size="11pt" style:font-size-asian="11pt" style:font-size-complex="11pt"/>
    </style:style>
    <style:style style:name="T22" style:family="text">
      <style:text-properties officeooo:rsid="004bc2cc"/>
    </style:style>
    <style:style style:name="T23" style:family="text">
      <style:text-properties officeooo:rsid="004ed849"/>
    </style:style>
    <style:style style:name="T24" style:family="text">
      <style:text-properties officeooo:rsid="005127df"/>
    </style:style>
    <style:style style:name="T25" style:family="text">
      <style:text-properties fo:font-style="italic" style:font-style-asian="italic" style:font-style-complex="italic"/>
    </style:style>
    <style:style style:name="T26" style:family="text">
      <style:text-properties officeooo:rsid="0064cbdd"/>
    </style:style>
    <style:style style:name="T27" style:family="text">
      <style:text-properties officeooo:rsid="005a4153"/>
    </style:style>
    <style:style style:name="T28" style:family="text">
      <style:text-properties officeooo:rsid="0058d747"/>
    </style:style>
    <style:style style:name="T29" style:family="text">
      <style:text-properties officeooo:rsid="005d9990"/>
    </style:style>
    <style:style style:name="T30" style:family="text">
      <style:text-properties officeooo:rsid="005d8d2b"/>
    </style:style>
    <style:style style:name="T31" style:family="text">
      <style:text-properties officeooo:rsid="005c22f2"/>
    </style:style>
    <style:style style:name="T32" style:family="text">
      <style:text-properties officeooo:rsid="00586a04"/>
    </style:style>
    <style:style style:name="T33" style:family="text">
      <style:text-properties officeooo:rsid="005eca1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office:annotation office:name="__Annotation__511_3572362212" loext:resolved="false"><dc:creator>Vladimir Herdman</dc:creator><dc:date>2026-05-15T20:49:22.083476000</dc:date><meta:creator-initials>VTH</meta:creator-initials><text:p text:style-name="Comment">Current idea is to make it like a love letter/goodbye letter/collection of poems/like a last date.</text:p><text:p text:style-name="Comment"/><text:p text:style-name="Comment">For the cover page, make it like “Goodbye Ollie” and then below it “A collection of Maybe-Poems by Vladimir Tomasovitch Herdman”</text:p><text:p text:style-name="Comment"/></office:annotation>GOODBYE OLLIE<text:span text:style-name="T1">­</text:span><office:annotation-end office:name="__Annotation__511_3572362212"/></text:p>
      <text:p text:style-name="P2"/>
      <text:p text:style-name="P2"/>
      <text:p text:style-name="P3"/>
      <text:p text:style-name="P3"/>
      <text:p text:style-name="P4"/>
      <text:p text:style-name="P4"/>
      <text:p text:style-name="P5"><office:annotation office:name="__Annotation__701_3423584298" loext:resolved="false"><dc:creator>Vladimir Herdman</dc:creator><dc:date>2026-06-01T23:03:00.084500000</dc:date><meta:creator-initials>VTH</meta:creator-initials><text:p text:style-name="Comment">Find out where the “for …” page goes to, and put “for ollie” or something.</text:p></office:annotation>GOODBYE OLLIE<office:annotation-end office:name="__Annotation__701_3423584298"/></text:p>
      <text:p text:style-name="P3"/>
      <text:p text:style-name="P3"/>
      <text:p text:style-name="P3"/>
      <text:p text:style-name="P3"/>
      <text:p text:style-name="P6">Vladimir Tomasovitch Herdman</text:p>
      <text:p text:style-name="P7"/>
      <text:p text:style-name="P8"/>
      <text:table-of-content text:style-name="Sect1" text:name="Table of Contents1">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on-Poetry_20_Title"/>
          </text:index-source-styles>
          <text:index-source-styles text:outline-level="2">
            <text:index-source-style text:style-name="Poetry_20_Title"/>
          </text:index-source-styles>
        </text:table-of-content-source>
        <text:index-body>
          <text:index-title text:style-name="Sect1" text:name="Table of Contents1_Head">
            <text:p text:style-name="Contents_20_Heading">Contents</text:p>
          </text:index-title>
          <text:p text:style-name="P9"><text:a xlink:type="simple" xlink:href="#__RefHeading___Toc1293_3676532460" office:name="Preface" text:style-name="Index_20_Link" text:visited-style-name="Index_20_Link">Preface<text:tab/>VII</text:a></text:p>
          <text:p text:style-name="P10"><text:a xlink:type="simple" xlink:href="#__RefHeading___Toc155_3645116443" office:name="Hello Ollie," text:style-name="Index_20_Link" text:visited-style-name="Index_20_Link">Hello Ollie,<text:tab/>1</text:a></text:p>
          <text:p text:style-name="P10"><text:a xlink:type="simple" xlink:href="#__RefHeading___Toc1331_3007704144" office:name="Rising Action" text:style-name="Index_20_Link" text:visited-style-name="Index_20_Link">Rising Action<text:tab/>2</text:a></text:p>
          <text:p text:style-name="P10"><text:a xlink:type="simple" xlink:href="#__RefHeading___Toc1329_3007704144" office:name="Climax" text:style-name="Index_20_Link" text:visited-style-name="Index_20_Link">Climax<text:tab/>3</text:a></text:p>
          <text:p text:style-name="P10"><text:a xlink:type="simple" xlink:href="#__RefHeading___Toc784_3676532460" office:name="What Have I Done" text:style-name="Index_20_Link" text:visited-style-name="Index_20_Link">What Have I Done<text:tab/>4</text:a></text:p>
          <text:p text:style-name="P10"><text:a xlink:type="simple" xlink:href="#__RefHeading___Toc1327_3007704144" office:name="Clean Up The Mess" text:style-name="Index_20_Link" text:visited-style-name="Index_20_Link">Clean Up The Mess<text:tab/>5</text:a></text:p>
          <text:p text:style-name="P10"><text:a xlink:type="simple" xlink:href="#__RefHeading___Toc1325_3007704144" office:name="Guilt Comes For Us All" text:style-name="Index_20_Link" text:visited-style-name="Index_20_Link">Guilt Comes For Us All<text:tab/>6</text:a></text:p>
          <text:p text:style-name="P10"><text:a xlink:type="simple" xlink:href="#__RefHeading___Toc1323_3007704144" office:name="Must I Grow Forever" text:style-name="Index_20_Link" text:visited-style-name="Index_20_Link">Must I Grow Forever<text:tab/>7</text:a></text:p>
          <text:p text:style-name="P10"><text:a xlink:type="simple" xlink:href="#__RefHeading___Toc1321_3007704144" office:name="Joy A Thief" text:style-name="Index_20_Link" text:visited-style-name="Index_20_Link">Joy A Thief<text:tab/>8</text:a></text:p>
          <text:p text:style-name="P10"><text:a xlink:type="simple" xlink:href="#__RefHeading___Toc782_3676532460" office:name="A Conversation In Emoticons" text:style-name="Index_20_Link" text:visited-style-name="Index_20_Link">A Conversation In Emoticons<text:tab/>9</text:a></text:p>
          <text:p text:style-name="P10"><text:a xlink:type="simple" xlink:href="#__RefHeading___Toc780_3676532460" office:name="Be Normal" text:style-name="Index_20_Link" text:visited-style-name="Index_20_Link">Be Normal<text:tab/>10</text:a></text:p>
          <text:p text:style-name="P10"><text:a xlink:type="simple" xlink:href="#__RefHeading___Toc778_3676532460" office:name="Ollie Ollie Ollie Ollie Ollie Ollie Ollie Ollie" text:style-name="Index_20_Link" text:visited-style-name="Index_20_Link">Ollie Ollie Ollie Ollie Ollie Ollie Ollie Ollie<text:tab/>11</text:a></text:p>
          <text:p text:style-name="P10"><text:a xlink:type="simple" xlink:href="#__RefHeading___Toc820_3326894427" office:name="Soapstone" text:style-name="Index_20_Link" text:visited-style-name="Index_20_Link">Soapstone<text:tab/>12</text:a></text:p>
          <text:p text:style-name="P10"><text:a xlink:type="simple" xlink:href="#__RefHeading___Toc818_3326894427" office:name="Another Place, Another time" text:style-name="Index_20_Link" text:visited-style-name="Index_20_Link">Another Place, Another time<text:tab/>13</text:a></text:p>
          <text:p text:style-name="P10"><text:a xlink:type="simple" xlink:href="#__RefHeading___Toc1025_1230340041" office:name="I’m Not Struggling" text:style-name="Index_20_Link" text:visited-style-name="Index_20_Link">I’m Not Struggling<text:tab/>14</text:a></text:p>
          <text:p text:style-name="P10"><text:a xlink:type="simple" xlink:href="#__RefHeading___Toc1319_3007704144" office:name="Maybe-Poem" text:style-name="Index_20_Link" text:visited-style-name="Index_20_Link">Maybe-Poem<text:tab/>16</text:a></text:p>
          <text:p text:style-name="P10"><text:a xlink:type="simple" xlink:href="#__RefHeading___Toc1023_1230340041" office:name="Between My Ears I Cannot Sing" text:style-name="Index_20_Link" text:visited-style-name="Index_20_Link">Between My Ears I Cannot Sing<text:tab/>18</text:a></text:p>
          <text:p text:style-name="P10"><text:a xlink:type="simple" xlink:href="#__RefHeading___Toc1317_3007704144" office:name="Never Bad News" text:style-name="Index_20_Link" text:visited-style-name="Index_20_Link">Never Bad News<text:tab/>20</text:a></text:p>
          <text:p text:style-name="P10"><text:a xlink:type="simple" xlink:href="#__RefHeading___Toc1123_1230340041" office:name="Ollie If He Was A Chinese Eunuch" text:style-name="Index_20_Link" text:visited-style-name="Index_20_Link">Ollie If He Was A Chinese Eunuch<text:tab/>21</text:a></text:p>
          <text:p text:style-name="P10"><text:a xlink:type="simple" xlink:href="#__RefHeading___Toc1315_3007704144" office:name="As I Lay Here Beside You" text:style-name="Index_20_Link" text:visited-style-name="Index_20_Link">As I Lay Here Beside You<text:tab/>22</text:a></text:p>
          <text:p text:style-name="P10"><text:a xlink:type="simple" xlink:href="#__RefHeading___Toc1313_3007704144" office:name="Clouds" text:style-name="Index_20_Link" text:visited-style-name="Index_20_Link">Clouds<text:tab/>23</text:a></text:p>
          <text:p text:style-name="P10"><text:a xlink:type="simple" xlink:href="#__RefHeading___Toc1125_1230340041" office:name="Instagramification I – No Time And Nothing To Do" text:style-name="Index_20_Link" text:visited-style-name="Index_20_Link">Instagramification I – No Time And Nothing To Do<text:tab/>24</text:a></text:p>
          <text:p text:style-name="P10"><text:a xlink:type="simple" xlink:href="#__RefHeading___Toc1125_1230340041%20Copy%201" office:name="Instagramification II – A Classic" text:style-name="Index_20_Link" text:visited-style-name="Index_20_Link">Instagramification II – A Classic<text:tab/>25</text:a></text:p>
          <text:p text:style-name="P10"><text:a xlink:type="simple" xlink:href="#__RefHeading___Toc776_3676532460" office:name="Goodbye Ollie," text:style-name="Index_20_Link" text:visited-style-name="Index_20_Link">Goodbye Ollie,<text:tab/>26</text:a></text:p>
        </text:index-body>
      </text:table-of-content>
      <text:p text:style-name="P11"/>
      <text:p text:style-name="P12"/>
      <text:p text:style-name="P13"><text:bookmark-start text:name="__RefHeading___Toc1293_3676532460"/>Preface<text:bookmark-end text:name="__RefHeading___Toc1293_3676532460"/></text:p>
      <text:p text:style-name="P14"/>
      <text:p text:style-name="P15"><text:span text:style-name="T2">The sum total of this book amounts to nothing but a joke. I refuse to stop telling this joke all on the grounds that I find it funny. I’ve lately been stopping myself, because I think it’s in bad taste now that Ollie’s escaped me. I’ve reached my bounds. A book I reread recently captures what I hope to present through this collection</text:span>:</text:p>
      <text:p text:style-name="Quote"/>
      <text:p text:style-name="Quote">All of the true things I am about to tell you are shameless lies.</text:p>
      <text:p text:style-name="Quote"><text:span text:style-name="T3">—</text:span><text:span text:style-name="T4">Kurt Vonnegut, Jr., </text:span><text:span text:style-name="T2">Cat’s Cradle</text:span></text:p>
      <text:p text:style-name="P16"/>
      <text:p text:style-name="P17">Nothing in these pages are true. Everything I’ve written comes from my heart and what I believe to be somewhat funny, or a little interesting. That probably means there’s something true in here, but that’s not up to me to decide.</text:p>
      <text:p text:style-name="P17"/>
      <text:p text:style-name="P17">Otherwise, all writing was formed with a single thought in mind: “How do I make Ollie a little uncomfortable here, but still willing to laugh about it?” If I hit the mark, you’ll know. <text:span text:style-name="T5">If not, forgive me— Nothing was meant too serious to cause harm.</text:span></text:p>
      <text:p text:style-name="P18"/>
      <text:p text:style-name="P19"><text:span text:style-name="T2">As a final </text:span><text:span text:style-name="T6">note on why I did this</text:span><text:span text:style-name="T2">, </text:span><text:span text:style-name="T6">t</text:span><text:span text:style-name="T7">here’s </text:span><text:span text:style-name="T8">nothing</text:span><text:span text:style-name="T7"> wrong with wanting to be an individual. </text:span><text:span text:style-name="T2">The only thing wrong is to </text:span><text:span text:style-name="T6">not </text:span><text:span text:style-name="T2">try.</text:span></text:p>
      <text:p text:style-name="P19"/>
      <text:p text:style-name="P19"><text:span text:style-name="T2">So that’s what I hope to get across here: I’m trying. I tried. </text:span><text:span text:style-name="T6">If I failed, better than those that never pursued a thought to its end.</text:span></text:p>
      <text:p text:style-name="P19"/>
      <text:p text:style-name="P20">Thank you.</text:p>
      <text:p text:style-name="P21"/>
      <text:p text:style-name="P7"/>
      <text:p text:style-name="Text_20_body"/>
      <text:p text:style-name="Text_20_body"/>
      <text:p text:style-name="Text_20_body"/>
      <text:p text:style-name="P22">I aint ever felt better and</text:p>
      <text:p text:style-name="P22">I aint ever been dumbe<text:span text:style-name="T1">r.</text:span></text:p>
      <text:p text:style-name="P23"><text:span text:style-name="T9">—</text:span><text:span text:style-name="T10">Jesse Welles</text:span></text:p>
      <text:p text:style-name="P24"/>
      <text:p text:style-name="P25">To give anything less than your best</text:p>
      <text:p text:style-name="P25">is to sacrifice the gift.</text:p>
      <text:p text:style-name="P26">—<text:span text:style-name="T11">Steve Prefontaine</text:span></text:p>
      <text:p text:style-name="P23"/>
      <text:p text:style-name="P27"><text:span text:style-name="Emphasis">I can’t even guess myself what it must be</text:span></text:p>
      <text:p text:style-name="P27"><text:span text:style-name="Emphasis">to live the life of a human being.</text:span></text:p>
      <text:p text:style-name="P23"><text:span text:style-name="Emphasis"><text:span text:style-name="T12">—</text:span></text:span><text:span text:style-name="Emphasis"><text:span text:style-name="T13">Osamu Dazai, </text:span></text:span><text:span text:style-name="Emphasis"><text:span text:style-name="T14">No Longer Human</text:span></text:span></text:p>
      <text:p text:style-name="P23"><text:span text:style-name="Emphasis"><text:span text:style-name="T14"/></text:span></text:p>
      <text:p text:style-name="P28">See the cat?</text:p>
      <text:p text:style-name="P29"><text:span text:style-name="Emphasis"><text:span text:style-name="T15">See the cradle?</text:span></text:span></text:p>
      <text:p text:style-name="P29"><text:span text:style-name="Emphasis"><text:span text:style-name="T12">—Kurt Vonnegut, Jr., </text:span></text:span><text:span text:style-name="Emphasis"><text:span text:style-name="T15">Cat’s Cradle</text:span></text:span></text:p>
      <text:p text:style-name="P23"><text:span text:style-name="Emphasis"><text:span text:style-name="T13"/></text:span></text:p>
      <text:p text:style-name="P30"><text:span text:style-name="Emphasis"><text:span text:style-name="T16">I don’t want to be normal,</text:span></text:span></text:p>
      <text:p text:style-name="P30"><text:span text:style-name="Emphasis"><text:span text:style-name="T16">I want to be me</text:span></text:span><text:span text:style-name="Emphasis">.</text:span></text:p>
      <text:p text:style-name="P30"><text:span text:style-name="Emphasis"><text:span text:style-name="T13">—</text:span></text:span><text:span text:style-name="Emphasis"><text:span text:style-name="T17">My Brain</text:span></text:span></text:p>
      <text:p text:style-name="P31" loext:marker-style-name="T18"><text:span text:style-name="T18"/></text:p>
      <text:p text:style-name="Text_20_body"/>
      <text:p text:style-name="P32"><text:bookmark-start text:name="__RefHeading___Toc155_3645116443"/><office:annotation office:name="__Annotation__441_2779579312" loext:resolved="false"><dc:creator>Vladimir Herdman</dc:creator><dc:date>2026-05-09T23:32:14.079003000</dc:date><meta:creator-initials>VTH</meta:creator-initials><text:p text:style-name="Comment">I’m thinking overly positive from here, to goofy/weird, to whatever I want towards the end of the book here.</text:p><text:p text:style-name="Comment"/></office:annotation>Hello Ollie<office:annotation-end office:name="__Annotation__441_2779579312"/>,<text:bookmark-end text:name="__RefHeading___Toc155_3645116443"/></text:p>
      <text:p text:style-name="Poetry_20_Text"/>
      <text:p text:style-name="P33">Hello Ollie,</text:p>
      <text:p text:style-name="P33"/>
      <text:p text:style-name="P33">From the first moment I met you I—</text:p>
      <text:p text:style-name="P33">When we met that fated August eve, I really wanted to just—</text:p>
      <text:p text:style-name="P33">Ollie, the effect you’ve had on me, truly...</text:p>
      <text:p text:style-name="P33"/>
      <text:p text:style-name="P33">I just can’t start this letter to you. I feel I can’t speak my mind. I don’t have the words to express myself, and I keep restarting. So, that’s what this book is for.</text:p>
      <text:p text:style-name="P33"/>
      <text:p text:style-name="P33">I plan on expressing some emotions— or thoughts— at least somewhere within this piece, ideas I couldn’t fully write out, ideas I had to keep rewriting ‘till I finally gave up.</text:p>
      <text:p text:style-name="P33"/>
      <text:p text:style-name="P33">This book, and every poem, is an attempt <text:span text:style-name="T19">a</text:span>t <text:span text:style-name="T19">some</text:span> <text:span text:style-name="T19">nebulous feeling within me</text:span>. Whether you call it poetry or not, that’s why the cover says this is a collection of “Maybe-Poems.” Got all my bases covered.</text:p>
      <text:p text:style-name="P33"/>
      <text:p text:style-name="P33">I hope you enjoy it! I hope it’s not too weird! I hope…</text:p>
      <text:p text:style-name="P33"/>
      <text:p text:style-name="P33">I hope you thought it was funny.</text:p>
      <text:p text:style-name="P33"/>
      <text:p text:style-name="P33">Sincerely,</text:p>
      <text:p text:style-name="P33">Dare I say lovingly,</text:p>
      <text:p text:style-name="P33">I dare,</text:p>
      <text:p text:style-name="P33">I do dare,</text:p>
      <text:p text:style-name="P33">Vova</text:p>
      <text:p text:style-name="P34"><text:bookmark-start text:name="__RefHeading___Toc1331_3007704144"/><office:annotation office:name="__Annotation__1492_1230340041" loext:resolved="false"><dc:creator>Vladimir Herdman</dc:creator><dc:date>2026-06-16T21:39:50.354253000</dc:date><meta:creator-initials>VTH</meta:creator-initials><text:p text:style-name="Comment">Make it a dick joke.</text:p></office:annotation>Rising Action<office:annotation-end office:name="__Annotation__1492_1230340041"/><text:bookmark-end text:name="__RefHeading___Toc1331_3007704144"/></text:p>
      <text:p text:style-name="P35"/>
      <text:p text:style-name="P35"/>
      <text:p text:style-name="P36"><text:bookmark-start text:name="__RefHeading___Toc1329_3007704144"/><office:annotation office:name="__Annotation__1467_1230340041" loext:resolved="false"><dc:creator>Vladimir Herdman</dc:creator><dc:date>2026-06-16T21:39:14.486307000</dc:date><meta:creator-initials>VTH</meta:creator-initials><text:p text:style-name="Comment">Base off ‘She Was Brand’ by E. E. Cummins.</text:p></office:annotation>Climax<office:annotation-end office:name="__Annotation__1467_1230340041"/><text:bookmark-end text:name="__RefHeading___Toc1329_3007704144"/></text:p>
      <text:p text:style-name="P35"/>
      <text:p text:style-name="P35"/>
      <text:p text:style-name="P37"><text:bookmark-start text:name="__RefHeading___Toc784_3676532460"/>What Have I Done<text:bookmark-end text:name="__RefHeading___Toc784_3676532460"/></text:p>
      <text:p text:style-name="P38"/>
      <text:p text:style-name="P38"/>
      <text:p text:style-name="P38"/>
      <text:p text:style-name="P38"/>
      <text:p text:style-name="P38"><text:s text:c="8"/><text:span text:style-name="T20">a <text:s text:c="47"/>ft <text:s text:c="31"/>s <text:s/>h</text:span></text:p>
      <text:p text:style-name="P39"><text:s text:c="2"/>wh <text:s text:c="3"/>t <text:s/>do I e <text:s text:c="2"/>en <text:s text:c="2"/>s ay to y o <text:s/>u <text:s/>a <text:s text:c="2"/>er <text:s text:c="30"/>am e</text:p>
      <text:p text:style-name="P39">suc h <text:s/>a m <text:s text:c="6"/>v <text:s text:c="2"/>I’v e <text:s text:c="6"/>ad e. My hea rt we t <text:s text:c="14"/>on th e</text:p>
      <text:p text:style-name="P39"><text:s text:c="5"/>agai nst ess <text:s text:c="16"/>m <text:s text:c="20"/>o <text:s/>c <text:s text:c="27"/>w a</text:p>
      <text:p text:style-name="P39"><text:s text:c="16"/>th e <text:s text:c="5"/>an <text:s text:c="3"/>I <text:s text:c="10"/>try in g <text:s text:c="2"/>t <text:s text:c="5"/>le <text:s text:c="29"/>l</text:p>
      <text:p text:style-name="P39"><text:s text:c="20"/>w <text:s text:c="7"/>d <text:s text:c="5"/>c <text:s text:c="30"/>an <text:s text:c="29"/>l</text:p>
      <text:p text:style-name="P39"><text:s text:c="19"/>a <text:s text:c="18"/>an <text:s text:c="30"/>up</text:p>
      <text:p text:style-name="P39"><text:s text:c="18"/>l <text:s text:c="22"/>‘t <text:s text:c="33"/>.</text:p>
      <text:p text:style-name="P39"><text:s text:c="20"/>l <text:s text:c="21"/>s</text:p>
      <text:p text:style-name="P39"><text:s text:c="45"/>to</text:p>
      <text:p text:style-name="P39"><text:s text:c="50"/>p</text:p>
      <text:p text:style-name="P39"/>
      <text:p text:style-name="P39"/>
      <text:p text:style-name="P39"><text:s text:c="65"/>We t an</text:p>
      <text:p text:style-name="P39"><text:s text:c="76"/>d</text:p>
      <text:p text:style-name="P39"><text:s text:c="73"/>dr I p</text:p>
      <text:p text:style-name="P39"><text:s text:c="81"/>pin g</text:p>
      <text:p text:style-name="P39"><text:s text:c="65"/>do w</text:p>
      <text:p text:style-name="P39"><text:s text:c="73"/>n <text:s text:c="2"/>t h</text:p>
      <text:p text:style-name="P39"><text:s text:c="83"/>e</text:p>
      <text:p text:style-name="P39"><text:s text:c="81"/>p</text:p>
      <text:p text:style-name="P39"><text:s text:c="84"/>a</text:p>
      <text:p text:style-name="P39"><text:s text:c="82"/>g</text:p>
      <text:p text:style-name="P39"><text:s text:c="88"/>e</text:p>
      <text:p text:style-name="P34"><text:bookmark-start text:name="__RefHeading___Toc1327_3007704144"/>Clean Up The Mess<text:bookmark-end text:name="__RefHeading___Toc1327_3007704144"/></text:p>
      <text:p text:style-name="P35"/>
      <text:p text:style-name="P35"/>
      <text:p text:style-name="P34"><text:bookmark-start text:name="__RefHeading___Toc1325_3007704144"/>Guilt Comes For Us All<text:bookmark-end text:name="__RefHeading___Toc1325_3007704144"/></text:p>
      <text:p text:style-name="P35"/>
      <text:p text:style-name="P35"/>
      <text:p text:style-name="P34"><text:bookmark-start text:name="__RefHeading___Toc1323_3007704144"/>Must I Grow Forever<text:bookmark-end text:name="__RefHeading___Toc1323_3007704144"/></text:p>
      <text:p text:style-name="P35"/>
      <text:p text:style-name="P35"/>
      <text:p text:style-name="P34"><text:bookmark-start text:name="__RefHeading___Toc1321_3007704144"/>Joy A Thief<text:bookmark-end text:name="__RefHeading___Toc1321_3007704144"/></text:p>
      <text:p text:style-name="P35"/>
      <text:p text:style-name="P35"/>
      <text:p text:style-name="P34"><text:bookmark-start text:name="__RefHeading___Toc782_3676532460"/>A Conversation In Emoticons<text:bookmark-end text:name="__RefHeading___Toc782_3676532460"/></text:p>
      <text:p text:style-name="P40"/>
      <text:p text:style-name="P40">\ (,,-_-,,) /</text:p>
      <text:p text:style-name="P34"><text:bookmark-start text:name="__RefHeading___Toc780_3676532460"/>Be Normal<text:bookmark-end text:name="__RefHeading___Toc780_3676532460"/></text:p>
      <text:p text:style-name="Poetry_20_Text"/>
      <text:p text:style-name="Poetry_20_Text">I don’t want to be normal,</text:p>
      <text:p text:style-name="Poetry_20_Text">I want to be me.</text:p>
      <text:p text:style-name="Poetry_20_Text"/>
      <text:p text:style-name="Poetry_20_Text">Isn’t that enough?</text:p>
      <text:p text:style-name="P41"><text:bookmark-start text:name="__RefHeading___Toc778_3676532460"/>Ollie Ollie Ollie Ollie Ollie Ollie Ollie Ollie<text:bookmark-end text:name="__RefHeading___Toc778_3676532460"/></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Vova<text:span text:style-name="T21"> </text:span>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34"><text:bookmark-start text:name="__RefHeading___Toc820_3326894427"/>Soapstone<text:bookmark-end text:name="__RefHeading___Toc820_3326894427"/></text:p>
      <text:p text:style-name="P42"/>
      <text:p text:style-name="P42">My heart is one of those</text:p>
      <text:p text:style-name="P42">smooth stones,</text:p>
      <text:p text:style-name="P42">hard to hold</text:p>
      <text:p text:style-name="P42">and easy to drop—</text:p>
      <text:p text:style-name="P42">to drop hard.</text:p>
      <text:p text:style-name="P42">It’ll slip right through</text:p>
      <text:p text:style-name="P42">your shaking fingers as you</text:p>
      <text:p text:style-name="P43">squeeze to the rhythm</text:p>
      <text:p text:style-name="P43"><text:span text:style-name="T22">and keep me alive</text:span>.</text:p>
      <text:p text:style-name="P42"/>
      <text:p text:style-name="P42">My stone is like oil</text:p>
      <text:p text:style-name="P42">and won’t mix</text:p>
      <text:p text:style-name="P42">with your water,</text:p>
      <text:p text:style-name="P42">no matter how much</text:p>
      <text:p text:style-name="P42">we hold on.</text:p>
      <text:p text:style-name="P42"/>
      <text:p text:style-name="P42">I only make</text:p>
      <text:p text:style-name="P42">myself clean</text:p>
      <text:p text:style-name="P44">slipping through</text:p>
      <text:p text:style-name="P45">your fingers.</text:p>
      <text:p text:style-name="P34"><text:bookmark-start text:name="__RefHeading___Toc818_3326894427"/>Another Place, Another time<text:bookmark-end text:name="__RefHeading___Toc818_3326894427"/></text:p>
      <text:p text:style-name="P44"/>
      <text:p text:style-name="P44">Are you <text:span text:style-name="T23">waiting</text:span>,</text:p>
      <text:p text:style-name="P44">are you out there;</text:p>
      <text:p text:style-name="P44"/>
      <text:p text:style-name="P44">Pushing off the now</text:p>
      <text:p text:style-name="P44">and thinking of...</text:p>
      <text:p text:style-name="P44"/>
      <text:p text:style-name="P44">Check back again</text:p>
      <text:p text:style-name="P44">after I've made it.</text:p>
      <text:p text:style-name="P44"/>
      <text:p text:style-name="P44">When we meet, <text:s/>when I, <text:s text:c="3"/>when I,</text:p>
      <text:p text:style-name="P44">when I see you.</text:p>
      <text:p text:style-name="P44"/>
      <text:p text:style-name="P44">There's tomorrow—</text:p>
      <text:p text:style-name="P44">always tomorrow.</text:p>
      <text:p text:style-name="P44"/>
      <text:p text:style-name="P44">Promise.</text:p>
      <text:p text:style-name="P34"><text:bookmark-start text:name="__RefHeading___Toc1025_1230340041"/>I’m Not Struggling<text:bookmark-end text:name="__RefHeading___Toc1025_1230340041"/></text:p>
      <text:p text:style-name="P44"/>
      <text:p text:style-name="P44">All the media I watch</text:p>
      <text:p text:style-name="P44">portrays love as a struggle</text:p>
      <text:p text:style-name="P44">of wills against some force,</text:p>
      <text:p text:style-name="P44">of conflict and resolution—</text:p>
      <text:p text:style-name="P44">a drama.</text:p>
      <text:p text:style-name="P44"/>
      <text:p text:style-name="P44">The protagonists come together,</text:p>
      <text:p text:style-name="P44">and through their struggle</text:p>
      <text:p text:style-name="P44">against some other force,</text:p>
      <text:p text:style-name="P44">learn to love eachother,</text:p>
      <text:p text:style-name="P44">strengthen their bonds,</text:p>
      <text:p text:style-name="P44">and form resolute declarations</text:p>
      <text:p text:style-name="P44">of understanding about the other<text:span text:style-name="T24">s</text:span>,</text:p>
      <text:p text:style-name="P44">as can only be learnt from</text:p>
      <text:p text:style-name="P44">facing hell with someone.</text:p>
      <text:p text:style-name="P44"/>
      <text:p text:style-name="P44">I <text:span text:style-name="T24">f</text:span>eel in myself a desire</text:p>
      <text:p text:style-name="P44">for <text:span text:style-name="T24">your</text:span> time, <text:span text:style-name="T24">but</text:span></text:p>
      <text:p text:style-name="P44">I don't think it's love,</text:p>
      <text:p text:style-name="P46">I don’t think it’d last after the first date.</text:p>
      <text:p text:style-name="P44"><text:span text:style-name="T24">M</text:span>aybe that's the culture in me,</text:p>
      <text:p text:style-name="P44">based off what I consume.</text:p>
      <text:p text:style-name="P44">I've broken my ability to love wholly,</text:p>
      <text:p text:style-name="P44">because I'm incapable of loving</text:p>
      <text:p text:style-name="P44">when times are good.</text:p>
      <text:p text:style-name="P44"/>
      <text:p text:style-name="P44">I love when it's bad.</text:p>
      <text:p text:style-name="P44">I don't have many issues,</text:p>
      <text:p text:style-name="P44">and I'm afraid to be</text:p>
      <text:p text:style-name="P44"><text:soft-page-break/>incapable of love.</text:p>
      <text:p text:style-name="P44"/>
      <text:p text:style-name="P44">Am I lonely,</text:p>
      <text:p text:style-name="P44">or forcing myself to...</text:p>
      <text:p text:style-name="P44"/>
      <text:p text:style-name="P44">What do I like.</text:p>
      <text:p text:style-name="P44"/>
      <text:p text:style-name="P44"/>
      <text:p text:style-name="P44">I'm disgusting.</text:p>
      <text:p text:style-name="P47"/>
      <text:p text:style-name="P47"/>
      <text:p text:style-name="P47"/>
      <text:p text:style-name="P47"/>
      <text:p text:style-name="P47">And I think I’m happy.</text:p>
      <text:p text:style-name="P34"><text:bookmark-start text:name="__RefHeading___Toc1319_3007704144"/>Maybe-Poem<text:bookmark-end text:name="__RefHeading___Toc1319_3007704144"/></text:p>
      <text:p text:style-name="P47"/>
      <text:p text:style-name="P47">Not enough image,</text:p>
      <text:p text:style-name="P48">and too directto be a poem.</text:p>
      <text:p text:style-name="P47">I've just written</text:p>
      <text:p text:style-name="P47">and thrown in</text:p>
      <text:p text:style-name="P47">some</text:p>
      <text:p text:style-name="P47">random</text:p>
      <text:p text:style-name="P47">line-breaks</text:p>
      <text:p text:style-name="P47">here and</text:p>
      <text:p text:style-name="P47">there;</text:p>
      <text:p text:style-name="P47">Maybe an expression</text:p>
      <text:p text:style-name="P47">of something on my mind,</text:p>
      <text:p text:style-name="P47">but so far,</text:p>
      <text:p text:style-name="P47">there's no meter or prose</text:p>
      <text:p text:style-name="P47">worth keeping on the page—</text:p>
      <text:p text:style-name="P49">or in my heart.</text:p>
      <text:p text:style-name="P47"/>
      <text:p text:style-name="P47">But hey,</text:p>
      <text:p text:style-name="P47">Bukowski called them his</text:p>
      <text:p text:style-name="P47"><text:s text:c="4"/><text:span text:style-name="T25">hot beer shits</text:span><text:span text:style-name="T9">,</text:span></text:p>
      <text:p text:style-name="P47">and I don't feel that way</text:p>
      <text:p text:style-name="P47">so I think I'll call them</text:p>
      <text:p text:style-name="P47"><text:s text:c="4"/>maybe-poems,</text:p>
      <text:p text:style-name="P47">from a maybe-person,</text:p>
      <text:p text:style-name="P47">or, maybe <text:s text:c="2"/>maybe</text:p>
      <text:p text:style-name="P47">maybe a poem,</text:p>
      <text:p text:style-name="P47">a poem that</text:p>
      <text:p text:style-name="P47">may be,</text:p>
      <text:p text:style-name="P47">if only a</text:p>
      <text:p text:style-name="P47">person like me</text:p>
      <text:p text:style-name="P47"><text:soft-page-break/>may be</text:p>
      <text:p text:style-name="P47">around</text:p>
      <text:p text:style-name="P47">someone like</text:p>
      <text:p text:style-name="P47">You.</text:p>
      <text:p text:style-name="P34"><text:bookmark-start text:name="__RefHeading___Toc1023_1230340041"/>Between My Ears I Cannot Sing<text:bookmark-end text:name="__RefHeading___Toc1023_1230340041"/></text:p>
      <text:p text:style-name="P47"/>
      <text:p text:style-name="Poetry_20_Text">As you walked away</text:p>
      <text:p text:style-name="Poetry_20_Text"/>
      <text:p text:style-name="P50"><text:tab/><text:span text:style-name="T26">I</text:span>t was my heart that first beat out of my chest. Slapping onto the floor, it kept pulsing while my teeth fell out and my skin sloughed off and my bones jumped out the hole in my chest, and the organs and liquids without their cage poured from me an ungodly spray of everything else wet and human.</text:p>
      <text:p text:style-name="P51"><text:tab/>All around, an ensemble started to their sections. The large intestine and colon formed chairs as small hand bones made stands for hairy sheet music. Muscle fibers rewrapped around jaw bone to fret strings, while the lungs, teeth, and larynx became a choir, and the skull a drum. Blood boiled, then congealed with lips and spit to form the brasses.</text:p>
      <text:p text:style-name="P51"><text:tab/>At the very center, a heart pumped erect as the conductor. Holding a metatarsal, it started waving <text:span text:style-name="T26">the</text:span> baton as the orchestra reared and let out every innermost</text:p>
      <text:p text:style-name="P51">desire.</text:p>
      <text:p text:style-name="P51"><text:tab/>Used to furtive glances, eyes now drowned in your sight burnt onto skin. Ears listened for the first time to ideas that were never given a second chance, having always been caught at the back of a throat, which now sang with teeth secrets never shared about everything extraordinary, beautiful, and you. Fingers flexed for a missed touch, all the while drumming on the one that hid it all.</text:p>
      <text:p text:style-name="P51"><text:tab/>Each part played their misuse, but I could not command them to stop. Just a single organ left, I tried to <text:soft-page-break/>convey every fault I ever had, every reason to avoid m<text:span text:style-name="T26">e</text:span>— but nothing came out as familiar hands raised the conductor, and I realized how perfect everything would be if only it was</text:p>
      <text:p text:style-name="Poetry_20_Text"/>
      <text:p text:style-name="Poetry_20_Text">without me.</text:p>
      <text:p text:style-name="P34"><text:bookmark-start text:name="__RefHeading___Toc1317_3007704144"/>Never Bad News<text:bookmark-end text:name="__RefHeading___Toc1317_3007704144"/></text:p>
      <text:p text:style-name="Poetry_20_Text"/>
      <text:p text:style-name="Poetry_20_Text">I must have been born wrong.</text:p>
      <text:p text:style-name="Poetry_20_Text">I think— <text:s text:c="2"/>I think—</text:p>
      <text:p text:style-name="Poetry_20_Text">I think there must be something</text:p>
      <text:p text:style-name="Poetry_20_Text">that separates me from everyone,</text:p>
      <text:p text:style-name="Poetry_20_Text">that something went wrong</text:p>
      <text:p text:style-name="Poetry_20_Text">in my development,</text:p>
      <text:p text:style-name="Poetry_20_Text">that something isn't normal in me.</text:p>
      <text:p text:style-name="Poetry_20_Text"/>
      <text:p text:style-name="P52">That somethin<text:span text:style-name="T27">g</text:span></text:p>
      <text:p text:style-name="P52">makes me not like you.</text:p>
      <text:p text:style-name="Poetry_20_Text"/>
      <text:p text:style-name="Poetry_20_Text">I want—</text:p>
      <text:p text:style-name="Poetry_20_Text">I want to be like you,</text:p>
      <text:p text:style-name="Poetry_20_Text">I want to be normal,</text:p>
      <text:p text:style-name="Poetry_20_Text">but something's wrong.</text:p>
      <text:p text:style-name="Poetry_20_Text"/>
      <text:p text:style-name="Poetry_20_Text">I don't know what happened,</text:p>
      <text:p text:style-name="Poetry_20_Text">but somewhere along the line,</text:p>
      <text:p text:style-name="Poetry_20_Text">I got lost,</text:p>
      <text:p text:style-name="Poetry_20_Text">and no one came back</text:p>
      <text:p text:style-name="Poetry_20_Text">to find me.</text:p>
      <text:p text:style-name="Poetry_20_Text"/>
      <text:p text:style-name="Poetry_20_Text">No one ever</text:p>
      <text:p text:style-name="Poetry_20_Text">wants to bring</text:p>
      <text:p text:style-name="Poetry_20_Text">bad news.</text:p>
      <text:p text:style-name="P34"><text:bookmark-start text:name="__RefHeading___Toc1123_1230340041"/>Ollie <text:span text:style-name="T28">If</text:span> <text:span text:style-name="T28">H</text:span>e <text:span text:style-name="T28">W</text:span>as <text:span text:style-name="T28">A Chinese Eunuch</text:span><text:bookmark-end text:name="__RefHeading___Toc1123_1230340041"/></text:p>
      <text:p text:style-name="Poetry_20_Text"/>
      <text:p text:style-name="Poetry_20_Text">I woke up last night,</text:p>
      <text:p text:style-name="Poetry_20_Text">no dihh—</text:p>
      <text:p text:style-name="Poetry_20_Text">Oh, uhhh</text:p>
      <text:p text:style-name="Poetry_20_Text">昨晚我醒过来,</text:p>
      <text:p text:style-name="Poetry_20_Text">发现没屌了.</text:p>
      <text:p text:style-name="P34"><text:bookmark-start text:name="__RefHeading___Toc1315_3007704144"/>As I Lay Here Beside You<text:bookmark-end text:name="__RefHeading___Toc1315_3007704144"/></text:p>
      <text:p text:style-name="Poetry_20_Text"/>
      <text:p text:style-name="Poetry_20_Text">I can only stare at the back of your head,</text:p>
      <text:p text:style-name="Poetry_20_Text">wondering</text:p>
      <text:p text:style-name="Poetry_20_Text">on what I should do,</text:p>
      <text:p text:style-name="Poetry_20_Text">on how I should talk to you tomorrow.</text:p>
      <text:p text:style-name="Poetry_20_Text"/>
      <text:p text:style-name="Poetry_20_Text">If I could but reach out</text:p>
      <text:p text:style-name="Poetry_20_Text">and touch you</text:p>
      <text:p text:style-name="Poetry_20_Text">as I can now laying here,</text:p>
      <text:p text:style-name="Poetry_20_Text">I would show you this heart—</text:p>
      <text:p text:style-name="Poetry_20_Text">place your hand over my chest,</text:p>
      <text:p text:style-name="Poetry_20_Text">this feeling made real.</text:p>
      <text:p text:style-name="Poetry_20_Text"/>
      <text:p text:style-name="Poetry_20_Text">As I lay here beside you,</text:p>
      <text:p text:style-name="Poetry_20_Text">I don't want to wake up</text:p>
      <text:p text:style-name="Poetry_20_Text">to an empty bed</text:p>
      <text:p text:style-name="Poetry_20_Text">and remember</text:p>
      <text:p text:style-name="Poetry_20_Text">yesterday's</text:p>
      <text:p text:style-name="Poetry_20_Text">Dream.</text:p>
      <text:p text:style-name="P34"><text:bookmark-start text:name="__RefHeading___Toc1313_3007704144"/>Clouds<text:bookmark-end text:name="__RefHeading___Toc1313_3007704144"/></text:p>
      <text:p text:style-name="P53"/>
      <text:p text:style-name="P53">I've caught myself</text:p>
      <text:p text:style-name="P53">looking out towards the horizon</text:p>
      <text:p text:style-name="P53">at clouds, big ones—</text:p>
      <text:p text:style-name="P53">so sharp their silhouette—</text:p>
      <text:p text:style-name="P53">just staring.</text:p>
      <text:p text:style-name="P53"/>
      <text:p text:style-name="P53">I wonder if</text:p>
      <text:p text:style-name="P53">that is what mountains</text:p>
      <text:p text:style-name="P53">look like</text:p>
      <text:p text:style-name="P53">from far away.</text:p>
      <text:p text:style-name="P53"/>
      <text:p text:style-name="P53">I just want to keep looking.</text:p>
      <text:p text:style-name="P53">I want to keep wondering if <text:s text:c="2"/>if <text:s text:c="6"/>if</text:p>
      <text:p text:style-name="P53">what I see is what I'll get,</text:p>
      <text:p text:style-name="P53"><text:span text:style-name="T29">if</text:span> there’s <text:span text:style-name="T29">so much more</text:span> out there.</text:p>
      <text:p text:style-name="P53"/>
      <text:p text:style-name="P53">I want <text:s text:c="2"/>I want</text:p>
      <text:p text:style-name="P53">I want to keep looking</text:p>
      <text:p text:style-name="P53">at <text:span text:style-name="T30">those</text:span> <text:span text:style-name="T30">distant</text:span> clouds</text:p>
      <text:p text:style-name="P53"><text:span text:style-name="T30">until </text:span>they disappear when</text:p>
      <text:p text:style-name="P53">I <text:span text:style-name="T29">forget to stare</text:span><text:span text:style-name="T31">.</text:span></text:p>
      <text:p text:style-name="P34"><text:bookmark-start text:name="__RefHeading___Toc1125_1230340041"/>Instagramification <text:span text:style-name="T32">I </text:span>– No Time And Nothing To Do<text:bookmark-end text:name="__RefHeading___Toc1125_1230340041"/></text:p>
      <text:p text:style-name="P54"/>
      <text:p text:style-name="P54">I've really got</text:p>
      <text:p text:style-name="P54">nothing to do,</text:p>
      <text:p text:style-name="P54">and so little time</text:p>
      <text:p text:style-name="P54">to do it.</text:p>
      <text:p text:style-name="P55"><text:bookmark-start text:name="__RefHeading___Toc1125_1230340041 Copy 1"/>Instagramification <text:span text:style-name="T32">I</text:span><text:span text:style-name="T33">I</text:span><text:span text:style-name="T32"> </text:span>– <text:span text:style-name="T33">A Classic</text:span><text:bookmark-end text:name="__RefHeading___Toc1125_1230340041 Copy 1"/></text:p>
      <text:p text:style-name="P56"/>
      <text:p text:style-name="P56">Roses are red,</text:p>
      <text:p text:style-name="P56"><text:span text:style-name="T33">V</text:span>iolets are blue,</text:p>
      <text:p text:style-name="P56">Ollie, my bed—</text:p>
      <text:p text:style-name="P56">Just me and you.</text:p>
      <text:p text:style-name="P34"><text:bookmark-start text:name="__RefHeading___Toc776_3676532460"/>Goodbye Ollie,<text:bookmark-end text:name="__RefHeading___Toc776_3676532460"/></text:p>
      <text:p text:style-name="P57"/>
      <text:p text:style-name="Poetry_20_Text">I feel utterly and irrefutably incapable of expressing myself fully within the bounds of the language I have grown up with. One of my greatest fears is that I am a wholly uni-faceted individual with no complex emotions and extreme predictability in my actions.</text:p>
      <text:p text:style-name="Poetry_20_Text"/>
      <text:p text:style-name="Poetry_20_Text">Maybe I’m not all that afraid of being unable to express myself, but that there’s nothing to express. I’m afraid of being nothing, that I have no dramatic knots in my living cords.</text:p>
      <text:p text:style-name="Poetry_20_Text"/>
      <text:p text:style-name="Poetry_20_Text">I’m sorry for making any of this. It was a waste of time, and I’ve only made myself sadder. I will one day be my undoing. Everything I say is a lie, and just a way to convince myself there’s something more to who I am. Forgive my reachings and idiosyncrasies for what they are, a lack of character and a desire for what I don’t have.</text:p>
      <text:p text:style-name="Poetry_20_Text"/>
      <text:p text:style-name="Poetry_20_Text">Sincerely,</text:p>
      <text:p text:style-name="Poetry_20_Text">Vo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family="'Times New Roman'"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75in" style:contextual-spacing="false" fo:line-height="115%"/>
      <style:text-properties officeooo:rsid="001ca094"/>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e" style:family="paragraph" style:parent-style-name="Text_20_body">
      <style:paragraph-properties fo:text-align="right" style:justify-single-word="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Poetry_20_Title" style:display-name="Poetry Title" style:family="paragraph" style:parent-style-name="Text_20_body">
      <style:paragraph-properties fo:margin-top="0in" fo:margin-bottom="0in" style:contextual-spacing="false"/>
      <style:text-properties fo:font-size="16pt" fo:font-weight="bold" officeooo:rsid="0014dda8"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5in" style:type="right" style:leader-style="dotted" style:leader-text="."/>
        </style:tab-stops>
      </style:paragraph-properties>
    </style:style>
    <style:style style:name="Poetry_20_Text" style:display-name="Poetry Text"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37de52"/>
    </style:style>
    <style:style style:name="Non-Poetry_20_Title" style:display-name="Non-Poetry Title" style:family="paragraph" style:parent-style-name="Text_20_body">
      <style:text-properties fo:font-size="16pt" fo:font-weight="bold" officeooo:rsid="0017f519"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4.303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Header_20_left">
      <style:paragraph-properties fo:text-align="left" style:justify-single-word="false"/>
    </style:style>
    <style:page-layout style:name="Mpm1" style:page-usage="mirrored">
      <style:page-layout-properties fo:page-width="5.5in" fo:page-height="8.5in" style:num-format="1"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5.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mirrored">
      <style:page-layout-properties fo:page-width="5.5in" fo:page-height="8.5in" style:num-format="I"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9">
      <style:page-layout-properties fo:page-width="5.5in" fo:page-height="8.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dnote" loext:hidden="true" style:hidden="true" style:page-layout-name="Mpm5" draw:style-name="Mdp1"/>
    <style:master-page style:name="Envelope" loext:hidden="true" style:hidden="true" style:page-layout-name="Mpm6" draw:style-name="Mdp1"/>
    <style:master-page style:name="Index" loext:hidden="true" style:hidden="true" style:page-layout-name="Mpm2" draw:style-name="Mdp1"/>
    <style:master-page style:name="Landscape" loext:hidden="true" style:hidden="true" style:page-layout-name="Mpm7" draw:style-name="Mdp1"/>
    <style:master-page style:name="Frontmatter" style:page-layout-name="Mpm8" draw:style-name="Mdp1">
      <style:header>
        <text:p text:style-name="MP1"><text:bookmark text:name="PageNumWizard_HEADER_Frontmatter-numbered5 Copy 5"/></text:p>
      </style:header>
      <style:header-left>
        <text:p text:style-name="MP2"><text:bookmark text:name="PageNumWizard_HEADER_Frontmatter-numbered5 Copy 5 Copy 29"/><text:bookmark text:name="PageNumWizard_HEADER_Frontmatter-numbered5 Copy 5 Copy 27"/><text:bookmark text:name="PageNumWizard_HEADER_Frontmatter-numbered5 Copy 5 Copy 25"/><text:bookmark text:name="PageNumWizard_HEADER_Frontmatter-numbered5 Copy 5 Copy 23"/><text:bookmark text:name="PageNumWizard_HEADER_Frontmatter-numbered5 Copy 5 Copy 21"/><text:bookmark text:name="PageNumWizard_HEADER_Frontmatter-numbered5 Copy 5 Copy 19"/><text:bookmark text:name="PageNumWizard_HEADER_Frontmatter-numbered5 Copy 5 Copy 17"/><text:bookmark text:name="PageNumWizard_HEADER_Frontmatter-numbered5 Copy 5 Copy 15"/><text:bookmark text:name="PageNumWizard_HEADER_Frontmatter-numbered5 Copy 5 Copy 13"/><text:bookmark text:name="PageNumWizard_HEADER_Frontmatter-numbered5 Copy 5 Copy 11"/><text:bookmark text:name="PageNumWizard_HEADER_Frontmatter-numbered5 Copy 5 Copy 9"/><text:bookmark text:name="PageNumWizard_HEADER_Frontmatter-numbered5 Copy 5 Copy 7"/><text:bookmark text:name="PageNumWizard_HEADER_Frontmatter-numbered5 Copy 5 Copy 5"/><text:bookmark text:name="PageNumWizard_HEADER_Frontmatter-numbered5 Copy 5 Copy 3"/><text:bookmark text:name="PageNumWizard_HEADER_Frontmatter-numbered5 Copy 5 Copy 1"/><text:bookmark text:name="PageNumWizard_HEADER_Frontmatter-numbered6 Copy 5"/><text:bookmark text:name="PageNumWizard_HEADER_Frontmatter-numbered5 Copy 5 Copy 2"/><text:bookmark text:name="PageNumWizard_HEADER_Frontmatter-numbered5 Copy 5 Copy 4"/><text:bookmark text:name="PageNumWizard_HEADER_Frontmatter-numbered5 Copy 5 Copy 6"/><text:bookmark text:name="PageNumWizard_HEADER_Frontmatter-numbered5 Copy 5 Copy 8"/><text:bookmark text:name="PageNumWizard_HEADER_Frontmatter-numbered5 Copy 5 Copy 10"/><text:bookmark text:name="PageNumWizard_HEADER_Frontmatter-numbered5 Copy 5 Copy 12"/><text:bookmark text:name="PageNumWizard_HEADER_Frontmatter-numbered5 Copy 5 Copy 14"/><text:bookmark text:name="PageNumWizard_HEADER_Frontmatter-numbered5 Copy 5 Copy 16"/><text:bookmark text:name="PageNumWizard_HEADER_Frontmatter-numbered5 Copy 5 Copy 18"/><text:bookmark text:name="PageNumWizard_HEADER_Frontmatter-numbered5 Copy 5 Copy 20"/><text:bookmark text:name="PageNumWizard_HEADER_Frontmatter-numbered5 Copy 5 Copy 22"/><text:bookmark text:name="PageNumWizard_HEADER_Frontmatter-numbered5 Copy 5 Copy 24"/><text:bookmark text:name="PageNumWizard_HEADER_Frontmatter-numbered5 Copy 5 Copy 26"/><text:bookmark text:name="PageNumWizard_HEADER_Frontmatter-numbered5 Copy 5 Copy 28"/></text:p>
      </style:header-left>
    </style:master-page>
    <style:master-page style:name="HTML" style:page-layout-name="Mpm9" draw:style-name="Mdp1"/>
    <style:master-page style:name="Footnote" style:page-layout-name="Mpm5" draw:style-name="Mdp1"/>
    <style:master-page style:name="Frontmatter-numbered" style:page-layout-name="Mpm8" draw:style-name="Mdp1">
      <style:header>
        <text:p text:style-name="MP1"><text:bookmark-start text:name="PageNumWizard_HEADER_Frontmatter-numbered5"/><text:page-number text:select-page="current">VII</text:page-number><text:bookmark-end text:name="PageNumWizard_HEADER_Frontmatter-numbered5"/></text:p>
      </style:header>
      <style:header-left>
        <text:p text:style-name="MP2"><text:bookmark-start text:name="PageNumWizard_HEADER_Frontmatter-numbered6"/><text:page-number text:select-page="current">0</text:page-number><text:bookmark-end text:name="PageNumWizard_HEADER_Frontmatter-numbered6"/></text:p>
      </style:header-left>
    </style:master-page>
    <style:master-page style:name="Poetry" style:page-layout-name="Mpm1" draw:style-name="Mdp1">
      <style:header>
        <text:p text:style-name="MP1"><text:bookmark-start text:name="PageNumWizard_HEADER_Poetry11"/><text:page-number text:select-page="current">25</text:page-number><text:bookmark-end text:name="PageNumWizard_HEADER_Poetry11"/></text:p>
      </style:header>
      <style:header-left>
        <text:p text:style-name="MP2"><text:bookmark-start text:name="PageNumWizard_HEADER_Poetry10"/><text:page-number text:select-page="current">26</text:page-number><text:bookmark-end text:name="PageNumWizard_HEADER_Poetry10"/></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6T22:18:00.969720000</meta:creation-date>
    <dc:date>2026-06-16T21:55:27.823890000</dc:date>
    <meta:editing-duration>P1DT5H9M46S</meta:editing-duration>
    <meta:editing-cycles>64</meta:editing-cycles>
    <meta:generator>LibreOffice/26.2.3.2$MacOSX_AARCH64 LibreOffice_project/70e089b17412e4cb7773e41413306b17a2328c34</meta:generator>
    <dc:creator>Vladimir Herdman</dc:creator>
    <meta:document-statistic meta:table-count="0" meta:image-count="0" meta:object-count="0" meta:page-count="36" meta:paragraph-count="323" meta:word-count="2185" meta:character-count="12752" meta:non-whitespace-character-count="9349"/>
  </office:meta>
</office:document-meta>
</file>