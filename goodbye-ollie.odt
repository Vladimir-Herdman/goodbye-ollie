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paragraph-properties fo:break-before="page"/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0in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0in"/>
        </style:tab-stops>
      </style:paragraph-properties>
    </style:style>
    <style:style style:name="P11" style:family="paragraph" style:parent-style-name="Text_20_body">
      <style:text-properties officeooo:rsid="0014dda8" officeooo:paragraph-rsid="0014dda8"/>
    </style:style>
    <style:style style:name="P12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3" style:family="paragraph" style:parent-style-name="Non-Poetry_20_Title" style:master-page-name="Frontmatter-numbered">
      <style:paragraph-properties style:page-number="auto" fo:break-before="page"/>
    </style:style>
    <style:style style:name="P14" style:family="paragraph" style:parent-style-name="Text_20_body">
      <style:paragraph-properties fo:line-height="100%"/>
      <style:text-properties officeooo:rsid="0017f519" officeooo:paragraph-rsid="0017f519"/>
    </style:style>
    <style:style style:name="P15" style:family="paragraph" style:parent-style-name="Text_20_body">
      <style:text-properties officeooo:rsid="003cfd76" officeooo:paragraph-rsid="003cfd76"/>
    </style:style>
    <style:style style:name="P16" style:family="paragraph" style:parent-style-name="Text_20_body">
      <style:text-properties officeooo:paragraph-rsid="0026bae4"/>
    </style:style>
    <style:style style:name="P17" style:family="paragraph" style:parent-style-name="Text_20_body">
      <style:text-properties officeooo:rsid="003d6ea7" officeooo:paragraph-rsid="003d6ea7"/>
    </style:style>
    <style:style style:name="P18" style:family="paragraph" style:parent-style-name="Text_20_body">
      <style:text-properties officeooo:paragraph-rsid="003d6ea7"/>
    </style:style>
    <style:style style:name="P19" style:family="paragraph" style:parent-style-name="Text_20_body">
      <style:text-properties officeooo:paragraph-rsid="003eb0bf"/>
    </style:style>
    <style:style style:name="P20" style:family="paragraph" style:parent-style-name="Text_20_body">
      <style:text-properties officeooo:rsid="003eb0bf" officeooo:paragraph-rsid="003eb0bf"/>
    </style:style>
    <style:style style:name="P21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22" style:family="paragraph" style:parent-style-name="Quote">
      <style:paragraph-properties fo:line-height="100%"/>
      <style:text-properties officeooo:paragraph-rsid="002874aa"/>
    </style:style>
    <style:style style:name="P23" style:family="paragraph" style:parent-style-name="Quote">
      <style:paragraph-properties fo:line-height="100%"/>
    </style:style>
    <style:style style:name="P24" style:family="paragraph" style:parent-style-name="Quote">
      <style:paragraph-properties fo:line-height="100%"/>
      <style:text-properties fo:font-style="normal" officeooo:rsid="00190dea" style:font-style-asian="normal" style:font-style-complex="normal"/>
    </style:style>
    <style:style style:name="P25" style:family="paragraph" style:parent-style-name="Quote">
      <style:paragraph-properties fo:line-height="100%"/>
      <style:text-properties fo:font-style="italic" officeooo:rsid="00190dea" officeooo:paragraph-rsid="003adb42" style:font-style-asian="italic" style:font-style-complex="italic"/>
    </style:style>
    <style:style style:name="P26" style:family="paragraph" style:parent-style-name="Quote">
      <style:paragraph-properties fo:line-height="100%"/>
      <style:text-properties fo:font-style="normal" officeooo:rsid="00190dea" officeooo:paragraph-rsid="003adb42" style:font-style-asian="normal" style:font-style-complex="normal"/>
    </style:style>
    <style:style style:name="P27" style:family="paragraph" style:parent-style-name="Quote">
      <style:paragraph-properties fo:line-height="100%"/>
      <style:text-properties officeooo:paragraph-rsid="0025510a"/>
    </style:style>
    <style:style style:name="P28" style:family="paragraph" style:parent-style-name="Quote">
      <style:paragraph-properties fo:line-height="100%"/>
      <style:text-properties fo:font-style="italic" officeooo:rsid="003adb42" officeooo:paragraph-rsid="003adb42" style:font-style-asian="italic" style:font-style-complex="italic"/>
    </style:style>
    <style:style style:name="P29" style:family="paragraph" style:parent-style-name="Quote">
      <style:paragraph-properties fo:line-height="100%"/>
      <style:text-properties fo:font-style="normal" officeooo:rsid="003adb42" officeooo:paragraph-rsid="003adb42" style:font-style-asian="normal" style:font-style-complex="normal"/>
    </style:style>
    <style:style style:name="P30" style:family="paragraph" style:parent-style-name="Quote">
      <style:paragraph-properties fo:line-height="100%"/>
      <style:text-properties officeooo:paragraph-rsid="002c7ab7"/>
    </style:style>
    <style:style style:name="P31" style:family="paragraph" style:parent-style-name="Comment">
      <style:paragraph-properties style:line-height-at-least="0.0693in" fo:break-before="page"/>
    </style:style>
    <style:style style:name="P32" style:family="paragraph" style:parent-style-name="Poetry_20_Title" style:master-page-name="Poetry">
      <style:paragraph-properties style:page-number="1" fo:break-before="page"/>
      <style:text-properties fo:font-size="16pt" officeooo:rsid="002c7ab7" officeooo:paragraph-rsid="002c7ab7" style:font-size-asian="16pt" style:font-size-complex="16pt"/>
    </style:style>
    <style:style style:name="P33" style:family="paragraph" style:parent-style-name="Poetry_20_Text">
      <style:text-properties officeooo:rsid="0038eaff" officeooo:paragraph-rsid="0038eaff"/>
    </style:style>
    <style:style style:name="P34" style:family="paragraph" style:parent-style-name="Poetry_20_Title">
      <style:paragraph-properties fo:break-before="page"/>
      <style:text-properties officeooo:paragraph-rsid="00491cb3"/>
    </style:style>
    <style:style style:name="P35" style:family="paragraph" style:parent-style-name="Poetry_20_Text">
      <style:text-properties officeooo:paragraph-rsid="00491cb3"/>
    </style:style>
    <style:style style:name="P36" style:family="paragraph" style:parent-style-name="Poetry_20_Text">
      <style:text-properties officeooo:rsid="00491cb3" officeooo:paragraph-rsid="00491cb3"/>
    </style:style>
    <style:style style:name="P37" style:family="paragraph" style:parent-style-name="Poetry_20_Title">
      <style:paragraph-properties fo:break-before="page"/>
    </style:style>
    <style:style style:name="P38" style:family="paragraph" style:parent-style-name="Poetry_20_Text">
      <style:text-properties officeooo:rsid="004069c6" officeooo:paragraph-rsid="004069c6"/>
    </style:style>
    <style:style style:name="P39" style:family="paragraph" style:parent-style-name="Poetry_20_Title">
      <style:paragraph-properties fo:break-before="page"/>
      <style:text-properties officeooo:rsid="0037de52" officeooo:paragraph-rsid="0037de52"/>
    </style:style>
    <style:style style:name="P40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25510a" officeooo:paragraph-rsid="0025510a"/>
    </style:style>
    <style:style style:name="T1" style:family="text">
      <style:text-properties officeooo:rsid="00197293"/>
    </style:style>
    <style:style style:name="T2" style:family="text">
      <style:text-properties officeooo:rsid="003d6ea7"/>
    </style:style>
    <style:style style:name="T3" style:family="text">
      <style:text-properties fo:font-style="normal" officeooo:rsid="003cfd76" style:font-style-asian="normal" style:font-style-complex="normal"/>
    </style:style>
    <style:style style:name="T4" style:family="text">
      <style:text-properties fo:font-style="normal" officeooo:rsid="003d6ea7" style:font-style-asian="normal" style:font-style-complex="normal"/>
    </style:style>
    <style:style style:name="T5" style:family="text">
      <style:text-properties officeooo:rsid="003eb0bf"/>
    </style:style>
    <style:style style:name="T6" style:family="text">
      <style:text-properties officeooo:rsid="0026bae4"/>
    </style:style>
    <style:style style:name="T7" style:family="text">
      <style:text-properties officeooo:rsid="003cfd76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90dea" style:font-style-asian="normal" style:font-style-complex="normal"/>
    </style:style>
    <style:style style:name="T10" style:family="text">
      <style:text-properties officeooo:rsid="003adb42"/>
    </style:style>
    <style:style style:name="T11" style:family="text">
      <style:text-properties fo:color="#000000" loext:opacity="100%" style:font-name="Times New Roman" fo:font-size="12pt" fo:letter-spacing="normal" fo:font-style="normal" fo:font-weight="normal" style:font-style-asian="normal" style:font-style-complex="normal" loext:padding="0in" loext:border="none"/>
    </style:style>
    <style:style style:name="T12" style:family="text">
      <style:text-properties fo:color="#000000" loext:opacity="100%" style:font-name="Times New Roman" fo:font-size="12pt" fo:letter-spacing="normal" fo:font-style="normal" fo:font-weight="normal" officeooo:rsid="0025510a" style:font-style-asian="normal" style:font-style-complex="normal" loext:padding="0in" loext:border="none"/>
    </style:style>
    <style:style style:name="T13" style:family="text">
      <style:text-properties fo:color="#000000" loext:opacity="100%" style:font-name="Times New Roman" fo:font-size="12pt" fo:letter-spacing="normal" fo:font-style="italic" fo:font-weight="normal" officeooo:rsid="0030af39" style:font-style-asian="italic" style:font-style-complex="italic" loext:padding="0in" loext:border="none"/>
    </style:style>
    <style:style style:name="T14" style:family="text">
      <style:text-properties fo:color="#000000" loext:opacity="100%" style:font-name="Times New Roman" fo:font-size="12pt" fo:letter-spacing="normal" fo:font-style="italic" fo:font-weight="normal" style:font-style-asian="italic" style:font-style-complex="italic" loext:padding="0in" loext:border="none"/>
    </style:style>
    <style:style style:name="T15" style:family="text">
      <style:text-properties officeooo:rsid="002c7ab7"/>
    </style:style>
    <style:style style:name="T16" style:family="text">
      <style:text-properties fo:color="#000000" loext:opacity="100%" style:font-name="Times New Roman" fo:font-size="12pt" fo:letter-spacing="normal" fo:font-style="normal" fo:font-weight="normal" officeooo:rsid="002c7ab7" style:font-style-asian="normal" style:font-style-complex="normal" loext:padding="0in" loext:border="none"/>
    </style:style>
    <style:style style:name="T17" style:family="text">
      <style:text-properties fo:font-style="normal" fo:font-weight="normal" style:font-style-asian="normal" style:font-weight-asian="normal"/>
    </style:style>
    <style:style style:name="T18" style:family="text">
      <style:text-properties officeooo:rsid="004382b0"/>
    </style:style>
    <style:style style:name="T19" style:family="text">
      <style:text-properties officeooo:rsid="00491cb3"/>
    </style:style>
    <style:style style:name="T20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office:annotation office:name="__Annotation__511_3572362212" loext:resolved="false"><dc:creator>Vladimir Herdman</dc:creator><dc:date>2026-05-15T20:49:22.083476000</dc:date><meta:creator-initials>VTH</meta:creator-initials><text:p text:style-name="Comment">Current idea is to make it like a love letter/goodbye letter/collection of poems/like a last date.</text:p><text:p text:style-name="Comment"/><text:p text:style-name="Comment">For the cover page, make it like “Goodbye Ollie” and then below it “A collection of Maybe-Poems by Vladimir Tomasovitch Herdman”</text:p><text:p text:style-name="Comment"/></office:annotation>GOODBYE OLLIE<text:span text:style-name="T1">­</text:span><office:annotation-end office:name="__Annotation__511_3572362212"/></text:p>
      <text:p text:style-name="P2"/>
      <text:p text:style-name="P2"/>
      <text:p text:style-name="P3"/>
      <text:p text:style-name="P3"/>
      <text:p text:style-name="P4"/>
      <text:p text:style-name="P4"/>
      <text:p text:style-name="P5"><office:annotation office:name="__Annotation__701_3423584298" loext:resolved="false"><dc:creator>Vladimir Herdman</dc:creator><dc:date>2026-06-01T23:03:00.084500000</dc:date><meta:creator-initials>VTH</meta:creator-initials><text:p text:style-name="Comment">Find out where the “for …” page goes to, and put “for ollie” or something.</text:p></office:annotation>GOODBYE OLLIE<office:annotation-end office:name="__Annotation__701_3423584298"/>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left" style:position="0in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in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on-Poetry_20_Title"/>
          </text:index-source-styles>
          <text:index-source-styles text:outline-level="2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<office:annotation office:name="__Annotation__2288_3676532460" loext:resolved="false"><dc:creator>Vladimir Herdman</dc:creator><dc:date>2026-06-07T14:11:18.901250000</dc:date><meta:creator-initials>VTH</meta:creator-initials><text:p text:style-name="Comment">Manually update table of contents on finish with ‘ / ‘ between title and page number.</text:p><text:p text:style-name="Comment"/></office:annotation>Contents<office:annotation-end office:name="__Annotation__2288_3676532460"/></text:p>
          </text:index-title>
          <text:p text:style-name="P9"><text:a xlink:type="simple" xlink:href="#__RefHeading___Toc1293_3676532460" office:name="Preface" text:style-name="Index_20_Link" text:visited-style-name="Index_20_Link">Preface<text:tab/>VII</text:a></text:p>
          <text:p text:style-name="P9"/>
          <text:p text:style-name="P10"><text:a xlink:type="simple" xlink:href="#__RefHeading___Toc155_3645116443" office:name="Hello Ollie," text:style-name="Index_20_Link" text:visited-style-name="Index_20_Link">Hello Ollie,<text:tab/>1</text:a></text:p>
          <text:p text:style-name="P10"><text:a xlink:type="simple" xlink:href="#__RefHeading___Toc784_3676532460" office:name="What Have I Done" text:style-name="Index_20_Link" text:visited-style-name="Index_20_Link">What Have I Done<text:tab/>2</text:a></text:p>
          <text:p text:style-name="P10"><text:a xlink:type="simple" xlink:href="#__RefHeading___Toc782_3676532460" office:name="A Conversation In Emoticons" text:style-name="Index_20_Link" text:visited-style-name="Index_20_Link">A Conversation In Emoticons<text:tab/>3</text:a></text:p>
          <text:p text:style-name="P10"><text:a xlink:type="simple" xlink:href="#__RefHeading___Toc780_3676532460" office:name="Be Normal" text:style-name="Index_20_Link" text:visited-style-name="Index_20_Link">Be Normal<text:tab/>4</text:a></text:p>
          <text:p text:style-name="P10"><text:a xlink:type="simple" xlink:href="#__RefHeading___Toc778_3676532460" office:name="Ollie Ollie Ollie Ollie Ollie Ollie Ollie Ollie" text:style-name="Index_20_Link" text:visited-style-name="Index_20_Link">Ollie Ollie Ollie Ollie Ollie Ollie Ollie Ollie<text:tab/>5</text:a></text:p>
          <text:p text:style-name="P10"><text:a xlink:type="simple" xlink:href="#__RefHeading___Toc776_3676532460" office:name="Goodbye Ollie," text:style-name="Index_20_Link" text:visited-style-name="Index_20_Link">Goodbye Ollie,<text:tab/>6</text:a></text:p>
        </text:index-body>
      </text:table-of-content>
      <text:p text:style-name="P11"/>
      <text:p text:style-name="P12"/>
      <text:p text:style-name="P13"><text:bookmark-start text:name="__RefHeading___Toc1293_3676532460"/>Preface<text:bookmark-end text:name="__RefHeading___Toc1293_3676532460"/></text:p>
      <text:p text:style-name="P14"/>
      <text:p text:style-name="P15"><text:span text:style-name="T2">The sum total of this book amounts to nothing but a joke. I refuse to stop telling this joke all on the grounds that I find it funny. I’ve lately been stopping myself in the middle of this joke, because I think it’s in bad taste now that Ollie’s escaped me. I’ve reached my bounds. A book I reread recently captures what I hope to present through this collection</text:span>:</text:p>
      <text:p text:style-name="Quote"/>
      <text:p text:style-name="Quote">All of the true things I am about to tell you are shameless lies.</text:p>
      <text:p text:style-name="Quote"><text:span text:style-name="T3">—</text:span><text:span text:style-name="T4">Kurt Vonnegut, Jr., </text:span><text:span text:style-name="T2">Cat’s Cradle</text:span></text:p>
      <text:p text:style-name="P16"/>
      <text:p text:style-name="P17">Nothing in these pages are true. Everything I’ve written comes from my heart and what I believe to be somewhat funny, or a little interesting. That probably means there’s something true in here, but that’s not up to me to decide.</text:p>
      <text:p text:style-name="P17"/>
      <text:p text:style-name="P17">Otherwise, all writing was formed with a single thought in mind: “How do I make Ollie a little uncomfortable here, but still willing to laugh about it?” If I hit the mark, you’ll know.</text:p>
      <text:p text:style-name="P18"/>
      <text:p text:style-name="P19"><text:span text:style-name="T2">As a final </text:span><text:span text:style-name="T5">note on why I did this</text:span><text:span text:style-name="T2">, </text:span><text:span text:style-name="T5">t</text:span><text:span text:style-name="T6">here’s </text:span><text:span text:style-name="T7">nothing</text:span><text:span text:style-name="T6"> wrong with wanting to be an individual. </text:span><text:span text:style-name="T2">The only thing wrong is to </text:span><text:span text:style-name="T5">not </text:span><text:span text:style-name="T2">try.</text:span></text:p>
      <text:p text:style-name="P19"/>
      <text:p text:style-name="P19"><text:span text:style-name="T2">So that’s what I hope to get across here: I’m trying. I tried. </text:span><text:span text:style-name="T5">If I failed, better than those that never pursued a thought to its end.</text:span></text:p>
      <text:p text:style-name="P19"/>
      <text:p text:style-name="P20">Thank you.</text:p>
      <text:p text:style-name="P21"/>
      <text:p text:style-name="P7"/>
      <text:p text:style-name="Text_20_body"/>
      <text:p text:style-name="Text_20_body"/>
      <text:p text:style-name="Text_20_body"/>
      <text:p text:style-name="P22">I aint ever felt better and</text:p>
      <text:p text:style-name="P22">I aint ever been dumbe<text:span text:style-name="T1">r.</text:span></text:p>
      <text:p text:style-name="P23"><text:span text:style-name="T8">—</text:span><text:span text:style-name="T9">Jesse Welles</text:span></text:p>
      <text:p text:style-name="P24"/>
      <text:p text:style-name="P25">To give anything less than your best</text:p>
      <text:p text:style-name="P25">is to sacrifice the gift.</text:p>
      <text:p text:style-name="P26">—<text:span text:style-name="T10">Steve Prefontaine</text:span></text:p>
      <text:p text:style-name="P23"/>
      <text:p text:style-name="P27"><text:span text:style-name="Emphasis">I can’t even guess myself what it must be</text:span></text:p>
      <text:p text:style-name="P27"><text:span text:style-name="Emphasis">to live the life of a human being.</text:span></text:p>
      <text:p text:style-name="P23"><text:span text:style-name="Emphasis"><text:span text:style-name="T11">—</text:span></text:span><text:span text:style-name="Emphasis"><text:span text:style-name="T12">Osamu Dazai, </text:span></text:span><text:span text:style-name="Emphasis"><text:span text:style-name="T13">No Longer Human</text:span></text:span></text:p>
      <text:p text:style-name="P23"><text:span text:style-name="Emphasis"><text:span text:style-name="T13"/></text:span></text:p>
      <text:p text:style-name="P28">See the cat?</text:p>
      <text:p text:style-name="P29"><text:span text:style-name="Emphasis"><text:span text:style-name="T14">See the cradle?</text:span></text:span></text:p>
      <text:p text:style-name="P29"><text:span text:style-name="Emphasis"><text:span text:style-name="T11">—Kurt Vonnegut, Jr., </text:span></text:span><text:span text:style-name="Emphasis"><text:span text:style-name="T14">Cat’s Cradle</text:span></text:span></text:p>
      <text:p text:style-name="P23"><text:span text:style-name="Emphasis"><text:span text:style-name="T12"/></text:span></text:p>
      <text:p text:style-name="P30"><text:span text:style-name="Emphasis"><text:span text:style-name="T15">I don’t want to be normal,</text:span></text:span></text:p>
      <text:p text:style-name="P30"><text:span text:style-name="Emphasis"><text:span text:style-name="T15">I want to be me</text:span></text:span><text:span text:style-name="Emphasis">.</text:span></text:p>
      <text:p text:style-name="P30"><text:span text:style-name="Emphasis"><text:span text:style-name="T12">—</text:span></text:span><text:span text:style-name="Emphasis"><text:span text:style-name="T16">My Brain</text:span></text:span></text:p>
      <text:p text:style-name="P31" loext:marker-style-name="T17"><text:span text:style-name="T17"/></text:p>
      <text:p text:style-name="Text_20_body"/>
      <text:p text:style-name="P32"><text:bookmark-start text:name="__RefHeading___Toc155_3645116443"/><office:annotation office:name="__Annotation__441_2779579312" loext:resolved="false"><dc:creator>Vladimir Herdman</dc:creator><dc:date>2026-05-09T23:32:14.079003000</dc:date><meta:creator-initials>VTH</meta:creator-initials><text:p text:style-name="Comment">I’m thinking overly positive from here, to goofy/weird, to whatever I want towards the end of the book here.</text:p><text:p text:style-name="Comment"/></office:annotation>Hello Ollie<office:annotation-end office:name="__Annotation__441_2779579312"/>,<text:bookmark-end text:name="__RefHeading___Toc155_3645116443"/></text:p>
      <text:p text:style-name="Poetry_20_Text"/>
      <text:p text:style-name="P33">Hello Ollie,</text:p>
      <text:p text:style-name="P33"/>
      <text:p text:style-name="P33">From the first moment I met you I—</text:p>
      <text:p text:style-name="P33">When we met that fated August eve, I really wanted to just—</text:p>
      <text:p text:style-name="P33">Ollie, the effect you’ve had on me, truly...</text:p>
      <text:p text:style-name="P33"/>
      <text:p text:style-name="P33">I just can’t start this letter to you. I feel I can’t speak my mind. I don’t have the words to express myself, and I keep restarting. So, that’s what this book is for.</text:p>
      <text:p text:style-name="P33"/>
      <text:p text:style-name="P33">I plan on expressing some emotions— or thoughts— at least somewhere within this piece, ideas I couldn’t fully write out, ideas I had to keep rewriting ‘till I finally gave up.</text:p>
      <text:p text:style-name="P33"/>
      <text:p text:style-name="P33">This book, and every poem, is an attempt <text:span text:style-name="T18">a</text:span>t <text:span text:style-name="T18">some</text:span> <text:span text:style-name="T18">nebulous feeling within me</text:span>. Whether you call it poetry or not, that’s why the cover says this is a collection of “Maybe-Poems.” Got all my bases covered.</text:p>
      <text:p text:style-name="P33"/>
      <text:p text:style-name="P33">I hope you enjoy it! I hope it’s not too weird! I hope…</text:p>
      <text:p text:style-name="P33"/>
      <text:p text:style-name="P33">I hope you thought it was funny.</text:p>
      <text:p text:style-name="P33"/>
      <text:p text:style-name="P33">Sincerely,</text:p>
      <text:p text:style-name="P33">Dare I say lovingly,</text:p>
      <text:p text:style-name="P33">I dare,</text:p>
      <text:p text:style-name="P33">I do dare,</text:p>
      <text:p text:style-name="P33">Vova</text:p>
      <text:p text:style-name="P34"><text:bookmark-start text:name="__RefHeading___Toc784_3676532460"/>What Have I Done<text:bookmark-end text:name="__RefHeading___Toc784_3676532460"/></text:p>
      <text:p text:style-name="P35"/>
      <text:p text:style-name="P35"/>
      <text:p text:style-name="P35"/>
      <text:p text:style-name="P35"/>
      <text:p text:style-name="P35"><text:s text:c="8"/><text:span text:style-name="T19">a <text:s text:c="47"/>ft <text:s text:c="31"/>s <text:s/>h</text:span></text:p>
      <text:p text:style-name="P36"><text:s text:c="2"/>wh <text:s text:c="3"/>t <text:s/>do I e <text:s text:c="2"/>en <text:s text:c="2"/>s ay to y o <text:s/>u <text:s/>a <text:s text:c="2"/>er <text:s text:c="30"/>am e</text:p>
      <text:p text:style-name="P36">suc h <text:s/>a m <text:s text:c="6"/>v <text:s text:c="2"/>I’v e <text:s text:c="6"/>ad e. My hea rt we t <text:s text:c="14"/>on th e</text:p>
      <text:p text:style-name="P36"><text:s text:c="5"/>agai nst ess <text:s text:c="16"/>m <text:s text:c="20"/>o <text:s/>c <text:s text:c="27"/>w a</text:p>
      <text:p text:style-name="P36"><text:s text:c="16"/>th e <text:s text:c="5"/>an <text:s text:c="3"/>I <text:s text:c="10"/>try in g <text:s text:c="2"/>t <text:s text:c="5"/>le <text:s text:c="29"/>l</text:p>
      <text:p text:style-name="P36"><text:s text:c="20"/>w <text:s text:c="7"/>d <text:s text:c="5"/>c <text:s text:c="30"/>an <text:s text:c="29"/>l</text:p>
      <text:p text:style-name="P36"><text:s text:c="19"/>a <text:s text:c="18"/>an <text:s text:c="30"/>up</text:p>
      <text:p text:style-name="P36"><text:s text:c="18"/>l <text:s text:c="22"/>‘t <text:s text:c="33"/>.</text:p>
      <text:p text:style-name="P36"><text:s text:c="20"/>l <text:s text:c="21"/>s</text:p>
      <text:p text:style-name="P36"><text:s text:c="45"/>to</text:p>
      <text:p text:style-name="P36"><text:s text:c="50"/>p</text:p>
      <text:p text:style-name="P36"/>
      <text:p text:style-name="P36"/>
      <text:p text:style-name="P36"><text:s text:c="65"/>We t an</text:p>
      <text:p text:style-name="P36"><text:s text:c="76"/>d</text:p>
      <text:p text:style-name="P36"><text:s text:c="73"/>dr I p</text:p>
      <text:p text:style-name="P36"><text:s text:c="81"/>pin g</text:p>
      <text:p text:style-name="P36"><text:s text:c="65"/>do w</text:p>
      <text:p text:style-name="P36"><text:s text:c="73"/>n <text:s text:c="2"/>t h</text:p>
      <text:p text:style-name="P36"><text:s text:c="83"/>e</text:p>
      <text:p text:style-name="P36"><text:s text:c="81"/>p</text:p>
      <text:p text:style-name="P36"><text:s text:c="84"/>a</text:p>
      <text:p text:style-name="P36"><text:s text:c="82"/>g</text:p>
      <text:p text:style-name="P35"><text:span text:style-name="T19"><text:s text:c="88"/>e</text:span></text:p>
      <text:p text:style-name="P37"><text:bookmark-start text:name="__RefHeading___Toc782_3676532460"/>A Conversation In Emoticons<text:bookmark-end text:name="__RefHeading___Toc782_3676532460"/></text:p>
      <text:p text:style-name="P38"/>
      <text:p text:style-name="P38">\ (,,-_-,,) /</text:p>
      <text:p text:style-name="P37"><text:bookmark-start text:name="__RefHeading___Toc780_3676532460"/>Be Normal<text:bookmark-end text:name="__RefHeading___Toc780_3676532460"/></text:p>
      <text:p text:style-name="Poetry_20_Text"/>
      <text:p text:style-name="Poetry_20_Text">I don’t want to be normal,</text:p>
      <text:p text:style-name="Poetry_20_Text">I want to be me.</text:p>
      <text:p text:style-name="Poetry_20_Text"/>
      <text:p text:style-name="Poetry_20_Text">Isn’t that enough?</text:p>
      <text:p text:style-name="P39"><text:bookmark-start text:name="__RefHeading___Toc778_3676532460"/>Ollie Ollie Ollie Ollie Ollie Ollie Ollie Ollie<text:bookmark-end text:name="__RefHeading___Toc778_3676532460"/>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Vova<text:span text:style-name="T20"> </text:span>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37"><text:bookmark-start text:name="__RefHeading___Toc776_3676532460"/>Goodbye Ollie,<text:bookmark-end text:name="__RefHeading___Toc776_3676532460"/></text:p>
      <text:p text:style-name="P40"/>
      <text:p text:style-name="Poetry_20_Text">I feel utterly and irrefutably incapable of expressing myself fully within the bounds of the language I have grown up with. One of my greatest fears is that I am a wholly uni-faceted individual with no complex emotions and extreme predictability in my actions.</text:p>
      <text:p text:style-name="Poetry_20_Text"/>
      <text:p text:style-name="Poetry_20_Text">Maybe I’m not all that afraid of being unable to express myself, but that there’s nothing to express. I’m afraid of being nothing, that I have no dramatic knots in my living cords.</text:p>
      <text:p text:style-name="Poetry_20_Text"/>
      <text:p text:style-name="Poetry_20_Text">I’m sorry for making any of this. It was a waste of time, and I’ve only made myself sadder. I will one day be my undoing. Everything I say is a lie, and just a way to convince myself there’s something more to who I am. Forgive my reachings and idiosyncrasies for what they are, a lack of character and a desire for what I don’t have.</text:p>
      <text:p text:style-name="Poetry_20_Text"/>
      <text:p text:style-name="Poetry_20_Text">Sincerely,</text:p>
      <text:p text:style-name="Poetry_20_Text">V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paragraph-properties fo:margin-top="0in" fo:margin-bottom="0in" style:contextual-spacing="false"/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Poetry_20_Text" style:display-name="Poetry Text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37de52"/>
    </style:style>
    <style:style style:name="Non-Poetry_20_Title" style:display-name="Non-Poetry Title" style:family="paragraph" style:parent-style-name="Text_20_body">
      <style:text-properties fo:font-size="16pt" fo:font-weight="bold" officeooo:rsid="0017f519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4.3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24"/><text:bookmark text:name="PageNumWizard_HEADER_Frontmatter-numbered5 Copy 5 Copy 22"/><text:bookmark text:name="PageNumWizard_HEADER_Frontmatter-numbered5 Copy 5 Copy 20"/><text:bookmark text:name="PageNumWizard_HEADER_Frontmatter-numbered5 Copy 5 Copy 18"/><text:bookmark text:name="PageNumWizard_HEADER_Frontmatter-numbered5 Copy 5 Copy 16"/><text:bookmark text:name="PageNumWizard_HEADER_Frontmatter-numbered5 Copy 5 Copy 14"/><text:bookmark text:name="PageNumWizard_HEADER_Frontmatter-numbered5 Copy 5 Copy 12"/><text:bookmark text:name="PageNumWizard_HEADER_Frontmatter-numbered5 Copy 5 Copy 10"/><text:bookmark text:name="PageNumWizard_HEADER_Frontmatter-numbered5 Copy 5 Copy 8"/><text:bookmark text:name="PageNumWizard_HEADER_Frontmatter-numbered5 Copy 5 Copy 6"/><text:bookmark text:name="PageNumWizard_HEADER_Frontmatter-numbered5 Copy 5 Copy 4"/><text:bookmark text:name="PageNumWizard_HEADER_Frontmatter-numbered5 Copy 5 Copy 2"/><text:bookmark text:name="PageNumWizard_HEADER_Frontmatter-numbered6 Copy 5"/><text:bookmark text:name="PageNumWizard_HEADER_Frontmatter-numbered5 Copy 5 Copy 1"/><text:bookmark text:name="PageNumWizard_HEADER_Frontmatter-numbered5 Copy 5 Copy 3"/><text:bookmark text:name="PageNumWizard_HEADER_Frontmatter-numbered5 Copy 5 Copy 5"/><text:bookmark text:name="PageNumWizard_HEADER_Frontmatter-numbered5 Copy 5 Copy 7"/><text:bookmark text:name="PageNumWizard_HEADER_Frontmatter-numbered5 Copy 5 Copy 9"/><text:bookmark text:name="PageNumWizard_HEADER_Frontmatter-numbered5 Copy 5 Copy 11"/><text:bookmark text:name="PageNumWizard_HEADER_Frontmatter-numbered5 Copy 5 Copy 13"/><text:bookmark text:name="PageNumWizard_HEADER_Frontmatter-numbered5 Copy 5 Copy 15"/><text:bookmark text:name="PageNumWizard_HEADER_Frontmatter-numbered5 Copy 5 Copy 17"/><text:bookmark text:name="PageNumWizard_HEADER_Frontmatter-numbered5 Copy 5 Copy 19"/><text:bookmark text:name="PageNumWizard_HEADER_Frontmatter-numbered5 Copy 5 Copy 21"/><text:bookmark text:name="PageNumWizard_HEADER_Frontmatter-numbered5 Copy 5 Copy 23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8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7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6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6-07T14:23:04.265339000</dc:date>
    <meta:editing-duration>PT2H20M42S</meta:editing-duration>
    <meta:editing-cycles>40</meta:editing-cycles>
    <meta:generator>LibreOffice/26.2.3.2$MacOSX_AARCH64 LibreOffice_project/70e089b17412e4cb7773e41413306b17a2328c34</meta:generator>
    <dc:creator>Vladimir Herdman</dc:creator>
    <meta:document-statistic meta:table-count="0" meta:image-count="0" meta:object-count="0" meta:page-count="16" meta:paragraph-count="120" meta:word-count="1133" meta:character-count="7392" meta:non-whitespace-character-count="4862"/>
  </office:meta>
</office:document-meta>
</file>