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master-page-name="Frontmatter">
      <style:paragraph-properties fo:text-align="center" style:justify-single-word="false" style:page-number="auto"/>
      <style:text-properties officeooo:rsid="0011bcbf" officeooo:paragraph-rsid="0011bcbf"/>
    </style:style>
    <style:style style:name="P2" style:family="paragraph" style:parent-style-name="Standard">
      <style:paragraph-properties fo:text-align="justify" style:justify-single-word="false" fo:break-before="page"/>
      <style:text-properties officeooo:rsid="0011bcbf" officeooo:paragraph-rsid="0011bcbf"/>
    </style:style>
    <style:style style:name="P3" style:family="paragraph" style:parent-style-name="Standard">
      <style:paragraph-properties fo:text-align="justify" style:justify-single-word="false"/>
      <style:text-properties officeooo:rsid="0011bcbf" officeooo:paragraph-rsid="0011bcbf"/>
    </style:style>
    <style:style style:name="P4" style:family="paragraph" style:parent-style-name="Standard">
      <style:paragraph-properties fo:text-align="justify" style:justify-single-word="false"/>
      <style:text-properties fo:font-size="32pt" fo:font-weight="bold" officeooo:rsid="0011bcbf" officeooo:paragraph-rsid="0011bcbf"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32pt" fo:font-weight="bold" officeooo:rsid="0011bcbf" officeooo:paragraph-rsid="0011bcbf" style:font-size-asian="32pt" style:font-weight-asian="bold" style:font-size-complex="32pt" style:font-weight-complex="bold"/>
    </style:style>
    <style:style style:name="P6" style:family="paragraph" style:parent-style-name="Standard">
      <style:paragraph-properties fo:text-align="center" style:justify-single-word="false"/>
      <style:text-properties fo:font-size="16pt" fo:font-style="italic" officeooo:rsid="0011bcbf" officeooo:paragraph-rsid="0011bcbf" style:font-size-asian="16pt" style:font-style-asian="italic" style:font-size-complex="16pt" style:font-style-complex="italic"/>
    </style:style>
    <style:style style:name="P7" style:family="paragraph" style:parent-style-name="Text_20_body">
      <style:paragraph-properties fo:break-before="page"/>
      <style:text-properties officeooo:rsid="0014dda8" officeooo:paragraph-rsid="0014dda8"/>
    </style:style>
    <style:style style:name="P8" style:family="paragraph" style:parent-style-name="Text_20_body">
      <style:paragraph-properties fo:break-before="page"/>
      <style:text-properties officeooo:paragraph-rsid="0014dda8"/>
    </style:style>
    <style:style style:name="P9" style:family="paragraph" style:parent-style-name="Contents_20_1">
      <style:paragraph-properties>
        <style:tab-stops>
          <style:tab-stop style:position="0in"/>
        </style:tab-stops>
      </style:paragraph-properties>
    </style:style>
    <style:style style:name="P10" style:family="paragraph" style:parent-style-name="Contents_20_2">
      <style:paragraph-properties>
        <style:tab-stops>
          <style:tab-stop style:position="0in"/>
        </style:tab-stops>
      </style:paragraph-properties>
    </style:style>
    <style:style style:name="P11" style:family="paragraph" style:parent-style-name="Text_20_body">
      <style:text-properties officeooo:rsid="0014dda8" officeooo:paragraph-rsid="0014dda8"/>
    </style:style>
    <style:style style:name="P12" style:family="paragraph" style:parent-style-name="Text_20_body" style:master-page-name="Frontmatter">
      <style:paragraph-properties style:page-number="auto" fo:break-before="page"/>
      <style:text-properties officeooo:rsid="0017f519" officeooo:paragraph-rsid="0014dda8"/>
    </style:style>
    <style:style style:name="P13" style:family="paragraph" style:parent-style-name="Non-Poetry_20_Title" style:master-page-name="Frontmatter-numbered">
      <style:paragraph-properties style:page-number="auto" fo:break-before="page"/>
    </style:style>
    <style:style style:name="P14" style:family="paragraph" style:parent-style-name="Text_20_body">
      <style:paragraph-properties fo:line-height="100%"/>
      <style:text-properties officeooo:rsid="0017f519" officeooo:paragraph-rsid="0017f519"/>
    </style:style>
    <style:style style:name="P15" style:family="paragraph" style:parent-style-name="Text_20_body">
      <style:text-properties officeooo:rsid="003cfd76" officeooo:paragraph-rsid="003cfd76"/>
    </style:style>
    <style:style style:name="P16" style:family="paragraph" style:parent-style-name="Text_20_body">
      <style:text-properties officeooo:paragraph-rsid="0026bae4"/>
    </style:style>
    <style:style style:name="P17" style:family="paragraph" style:parent-style-name="Text_20_body">
      <style:text-properties officeooo:rsid="003d6ea7" officeooo:paragraph-rsid="003d6ea7"/>
    </style:style>
    <style:style style:name="P18" style:family="paragraph" style:parent-style-name="Text_20_body">
      <style:text-properties officeooo:paragraph-rsid="003d6ea7"/>
    </style:style>
    <style:style style:name="P19" style:family="paragraph" style:parent-style-name="Text_20_body">
      <style:text-properties officeooo:paragraph-rsid="003eb0bf"/>
    </style:style>
    <style:style style:name="P20" style:family="paragraph" style:parent-style-name="Text_20_body">
      <style:text-properties officeooo:rsid="003eb0bf" officeooo:paragraph-rsid="003eb0bf"/>
    </style:style>
    <style:style style:name="P21" style:family="paragraph" style:parent-style-name="Text_20_body" style:master-page-name="Frontmatter">
      <style:paragraph-properties style:page-number="auto" fo:break-before="page"/>
      <style:text-properties officeooo:rsid="0014dda8" officeooo:paragraph-rsid="0014dda8"/>
    </style:style>
    <style:style style:name="P22" style:family="paragraph" style:parent-style-name="Quote">
      <style:paragraph-properties fo:line-height="100%"/>
      <style:text-properties officeooo:paragraph-rsid="002874aa"/>
    </style:style>
    <style:style style:name="P23" style:family="paragraph" style:parent-style-name="Quote">
      <style:paragraph-properties fo:line-height="100%"/>
    </style:style>
    <style:style style:name="P24" style:family="paragraph" style:parent-style-name="Quote">
      <style:paragraph-properties fo:line-height="100%"/>
      <style:text-properties fo:font-style="normal" officeooo:rsid="00190dea" style:font-style-asian="normal" style:font-style-complex="normal"/>
    </style:style>
    <style:style style:name="P25" style:family="paragraph" style:parent-style-name="Quote">
      <style:paragraph-properties fo:line-height="100%"/>
      <style:text-properties fo:font-style="italic" officeooo:rsid="00190dea" officeooo:paragraph-rsid="003adb42" style:font-style-asian="italic" style:font-style-complex="italic"/>
    </style:style>
    <style:style style:name="P26" style:family="paragraph" style:parent-style-name="Quote">
      <style:paragraph-properties fo:line-height="100%"/>
      <style:text-properties fo:font-style="normal" officeooo:rsid="00190dea" officeooo:paragraph-rsid="003adb42" style:font-style-asian="normal" style:font-style-complex="normal"/>
    </style:style>
    <style:style style:name="P27" style:family="paragraph" style:parent-style-name="Quote">
      <style:paragraph-properties fo:line-height="100%"/>
      <style:text-properties officeooo:paragraph-rsid="0025510a"/>
    </style:style>
    <style:style style:name="P28" style:family="paragraph" style:parent-style-name="Quote">
      <style:paragraph-properties fo:line-height="100%"/>
      <style:text-properties fo:font-style="italic" officeooo:rsid="003adb42" officeooo:paragraph-rsid="003adb42" style:font-style-asian="italic" style:font-style-complex="italic"/>
    </style:style>
    <style:style style:name="P29" style:family="paragraph" style:parent-style-name="Quote">
      <style:paragraph-properties fo:line-height="100%"/>
      <style:text-properties fo:font-style="normal" officeooo:rsid="003adb42" officeooo:paragraph-rsid="003adb42" style:font-style-asian="normal" style:font-style-complex="normal"/>
    </style:style>
    <style:style style:name="P30" style:family="paragraph" style:parent-style-name="Quote">
      <style:paragraph-properties fo:line-height="100%"/>
      <style:text-properties officeooo:paragraph-rsid="002c7ab7"/>
    </style:style>
    <style:style style:name="P31" style:family="paragraph" style:parent-style-name="Comment">
      <style:paragraph-properties style:line-height-at-least="0.0693in" fo:break-before="page"/>
    </style:style>
    <style:style style:name="P32" style:family="paragraph" style:parent-style-name="Poetry_20_Title" style:master-page-name="Poetry">
      <style:paragraph-properties style:page-number="1" fo:break-before="page"/>
      <style:text-properties fo:font-size="16pt" officeooo:rsid="002c7ab7" officeooo:paragraph-rsid="002c7ab7" style:font-size-asian="16pt" style:font-size-complex="16pt"/>
    </style:style>
    <style:style style:name="P33" style:family="paragraph" style:parent-style-name="Poetry_20_Text">
      <style:text-properties officeooo:rsid="0038eaff" officeooo:paragraph-rsid="0038eaff"/>
    </style:style>
    <style:style style:name="P34" style:family="paragraph" style:parent-style-name="Poetry_20_Title">
      <style:paragraph-properties fo:break-before="page"/>
      <style:text-properties officeooo:paragraph-rsid="00491cb3"/>
    </style:style>
    <style:style style:name="P35" style:family="paragraph" style:parent-style-name="Poetry_20_Text">
      <style:text-properties officeooo:paragraph-rsid="00491cb3"/>
    </style:style>
    <style:style style:name="P36" style:family="paragraph" style:parent-style-name="Poetry_20_Text">
      <style:text-properties officeooo:rsid="00491cb3" officeooo:paragraph-rsid="00491cb3"/>
    </style:style>
    <style:style style:name="P37" style:family="paragraph" style:parent-style-name="Poetry_20_Title">
      <style:paragraph-properties fo:break-before="page"/>
    </style:style>
    <style:style style:name="P38" style:family="paragraph" style:parent-style-name="Poetry_20_Text">
      <style:text-properties officeooo:rsid="004069c6" officeooo:paragraph-rsid="004069c6"/>
    </style:style>
    <style:style style:name="P39" style:family="paragraph" style:parent-style-name="Poetry_20_Title">
      <style:paragraph-properties fo:break-before="page"/>
      <style:text-properties officeooo:rsid="0037de52" officeooo:paragraph-rsid="0037de52"/>
    </style:style>
    <style:style style:name="P40" style:family="paragraph" style:parent-style-name="Poetry_20_Text">
      <style:text-properties officeooo:rsid="004a6587" officeooo:paragraph-rsid="004a6587"/>
    </style:style>
    <style:style style:name="P41" style:family="paragraph" style:parent-style-name="Poetry_20_Text">
      <style:text-properties officeooo:rsid="004a6587" officeooo:paragraph-rsid="004bc2cc"/>
    </style:style>
    <style:style style:name="P42" style:family="paragraph" style:parent-style-name="Poetry_20_Text">
      <style:text-properties officeooo:rsid="004bc2cc" officeooo:paragraph-rsid="004bc2cc"/>
    </style:style>
    <style:style style:name="P43" style:family="paragraph" style:parent-style-name="Poetry_20_Text">
      <style:paragraph-properties fo:margin-top="0in" fo:margin-bottom="0.1965in" style:contextual-spacing="false"/>
      <style:text-properties officeooo:rsid="004bc2cc" officeooo:paragraph-rsid="004bc2cc"/>
    </style:style>
    <style:style style:name="P44" style:family="paragraph" style:parent-style-name="Poetry_20_Text">
      <style:text-properties officeooo:rsid="005127df" officeooo:paragraph-rsid="005127df"/>
    </style:style>
    <style:style style:name="P45" style:family="paragraph" style:parent-style-name="Poetry_20_Text">
      <style:text-properties officeooo:rsid="00527118" officeooo:paragraph-rsid="00527118"/>
    </style:style>
    <style:style style:name="P46" style:family="paragraph" style:parent-style-name="Poetry_20_Text" style:master-page-name="">
      <loext:graphic-properties draw:fill="none"/>
      <style:paragraph-properties fo:margin-left="0.5in" fo:margin-right="0in" fo:margin-top="0in" fo:margin-bottom="0in" style:contextual-spacing="false" fo:line-height="115%" fo:text-align="justify" style:justify-single-word="false" fo:text-indent="0in" style:auto-text-indent="false" style:page-number="auto" fo:background-color="transparent">
        <style:tab-stops>
          <style:tab-stop style:position="0.4984in"/>
        </style:tab-stops>
      </style:paragraph-properties>
    </style:style>
    <style:style style:name="P47" style:family="paragraph" style:parent-style-name="Poetry_20_Text">
      <loext:graphic-properties draw:fill="none"/>
      <style:paragraph-properties fo:margin-left="0.5in" fo:margin-right="0in" fo:margin-top="0in" fo:margin-bottom="0in" style:contextual-spacing="false" fo:line-height="115%" fo:text-align="justify" style:justify-single-word="false" fo:text-indent="0in" style:auto-text-indent="false" fo:background-color="transparent">
        <style:tab-stops>
          <style:tab-stop style:position="0.4984in"/>
        </style:tab-stops>
      </style:paragraph-properties>
    </style:style>
    <style:style style:name="P48" style:family="paragraph" style:parent-style-name="Poetry_20_Text">
      <style:text-properties officeooo:rsid="00586a04" officeooo:paragraph-rsid="00586a04"/>
    </style:style>
    <style:style style:name="P49" style:family="paragraph" style:parent-style-name="Text_20_body">
      <style:paragraph-properties fo:margin-top="0in" fo:margin-bottom="0in" style:contextual-spacing="false">
        <style:tab-stops>
          <style:tab-stop style:position="1.502in"/>
          <style:tab-stop style:position="2.3626in"/>
        </style:tab-stops>
      </style:paragraph-properties>
      <style:text-properties officeooo:rsid="0025510a" officeooo:paragraph-rsid="0025510a"/>
    </style:style>
    <style:style style:name="T1" style:family="text">
      <style:text-properties officeooo:rsid="00197293"/>
    </style:style>
    <style:style style:name="T2" style:family="text">
      <style:text-properties officeooo:rsid="003d6ea7"/>
    </style:style>
    <style:style style:name="T3" style:family="text">
      <style:text-properties fo:font-style="normal" officeooo:rsid="003cfd76" style:font-style-asian="normal" style:font-style-complex="normal"/>
    </style:style>
    <style:style style:name="T4" style:family="text">
      <style:text-properties fo:font-style="normal" officeooo:rsid="003d6ea7" style:font-style-asian="normal" style:font-style-complex="normal"/>
    </style:style>
    <style:style style:name="T5" style:family="text">
      <style:text-properties officeooo:rsid="003eb0bf"/>
    </style:style>
    <style:style style:name="T6" style:family="text">
      <style:text-properties officeooo:rsid="0026bae4"/>
    </style:style>
    <style:style style:name="T7" style:family="text">
      <style:text-properties officeooo:rsid="003cfd76"/>
    </style:style>
    <style:style style:name="T8" style:family="text">
      <style:text-properties fo:font-style="normal" style:font-style-asian="normal" style:font-style-complex="normal"/>
    </style:style>
    <style:style style:name="T9" style:family="text">
      <style:text-properties fo:font-style="normal" officeooo:rsid="00190dea" style:font-style-asian="normal" style:font-style-complex="normal"/>
    </style:style>
    <style:style style:name="T10" style:family="text">
      <style:text-properties officeooo:rsid="003adb42"/>
    </style:style>
    <style:style style:name="T11" style:family="text">
      <style:text-properties fo:color="#000000" loext:opacity="100%" style:font-name="Times New Roman" fo:font-size="12pt" fo:letter-spacing="normal" fo:font-style="normal" fo:font-weight="normal" style:font-style-asian="normal" style:font-style-complex="normal" loext:padding="0in" loext:border="none"/>
    </style:style>
    <style:style style:name="T12" style:family="text">
      <style:text-properties fo:color="#000000" loext:opacity="100%" style:font-name="Times New Roman" fo:font-size="12pt" fo:letter-spacing="normal" fo:font-style="normal" fo:font-weight="normal" officeooo:rsid="0025510a" style:font-style-asian="normal" style:font-style-complex="normal" loext:padding="0in" loext:border="none"/>
    </style:style>
    <style:style style:name="T13" style:family="text">
      <style:text-properties fo:color="#000000" loext:opacity="100%" style:font-name="Times New Roman" fo:font-size="12pt" fo:letter-spacing="normal" fo:font-style="italic" fo:font-weight="normal" officeooo:rsid="0030af39" style:font-style-asian="italic" style:font-style-complex="italic" loext:padding="0in" loext:border="none"/>
    </style:style>
    <style:style style:name="T14" style:family="text">
      <style:text-properties fo:color="#000000" loext:opacity="100%" style:font-name="Times New Roman" fo:font-size="12pt" fo:letter-spacing="normal" fo:font-style="italic" fo:font-weight="normal" style:font-style-asian="italic" style:font-style-complex="italic" loext:padding="0in" loext:border="none"/>
    </style:style>
    <style:style style:name="T15" style:family="text">
      <style:text-properties officeooo:rsid="002c7ab7"/>
    </style:style>
    <style:style style:name="T16" style:family="text">
      <style:text-properties fo:color="#000000" loext:opacity="100%" style:font-name="Times New Roman" fo:font-size="12pt" fo:letter-spacing="normal" fo:font-style="normal" fo:font-weight="normal" officeooo:rsid="002c7ab7" style:font-style-asian="normal" style:font-style-complex="normal" loext:padding="0in" loext:border="none"/>
    </style:style>
    <style:style style:name="T17" style:family="text">
      <style:text-properties fo:font-style="normal" fo:font-weight="normal" style:font-style-asian="normal" style:font-weight-asian="normal"/>
    </style:style>
    <style:style style:name="T18" style:family="text">
      <style:text-properties officeooo:rsid="004382b0"/>
    </style:style>
    <style:style style:name="T19" style:family="text">
      <style:text-properties officeooo:rsid="00491cb3"/>
    </style:style>
    <style:style style:name="T20" style:family="text">
      <style:text-properties fo:font-size="11pt" style:font-size-asian="11pt" style:font-size-complex="11pt"/>
    </style:style>
    <style:style style:name="T21" style:family="text">
      <style:text-properties officeooo:rsid="004bc2cc"/>
    </style:style>
    <style:style style:name="T22" style:family="text">
      <style:text-properties officeooo:rsid="004ed849"/>
    </style:style>
    <style:style style:name="T23" style:family="text">
      <style:text-properties officeooo:rsid="005127df"/>
    </style:style>
    <style:style style:name="T24" style:family="text">
      <style:text-properties officeooo:rsid="00586a04"/>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pan><office:annotation office:name="__Annotation__511_3572362212" loext:resolved="false"><dc:creator>Vladimir Herdman</dc:creator><dc:date>2026-05-15T20:49:22.083476000</dc:date><meta:creator-initials>VTH</meta:creator-initials><text:p text:style-name="Comment">Current idea is to make it like a love letter/goodbye letter/collection of poems/like a last date.</text:p><text:p text:style-name="Comment"/><text:p text:style-name="Comment">For the cover page, make it like “Goodbye Ollie” and then below it “A collection of Maybe-Poems by Vladimir Tomasovitch Herdman”</text:p><text:p text:style-name="Comment"/></office:annotation>GOODBYE OLLIE<text:span text:style-name="T1">­</text:span><office:annotation-end office:name="__Annotation__511_3572362212"/></text:p>
      <text:p text:style-name="P2"/>
      <text:p text:style-name="P2"/>
      <text:p text:style-name="P3"/>
      <text:p text:style-name="P3"/>
      <text:p text:style-name="P4"/>
      <text:p text:style-name="P4"/>
      <text:p text:style-name="P5"><office:annotation office:name="__Annotation__701_3423584298" loext:resolved="false"><dc:creator>Vladimir Herdman</dc:creator><dc:date>2026-06-01T23:03:00.084500000</dc:date><meta:creator-initials>VTH</meta:creator-initials><text:p text:style-name="Comment">Find out where the “for …” page goes to, and put “for ollie” or something.</text:p></office:annotation>GOODBYE OLLIE<office:annotation-end office:name="__Annotation__701_3423584298"/></text:p>
      <text:p text:style-name="P3"/>
      <text:p text:style-name="P3"/>
      <text:p text:style-name="P3"/>
      <text:p text:style-name="P3"/>
      <text:p text:style-name="P6">Vladimir Tomasovitch Herdman</text:p>
      <text:p text:style-name="P7"/>
      <text:p text:style-name="P8"/>
      <text:table-of-content text:style-name="Sect1" text:name="Table of Contents1">
        <text:table-of-content-source text:outline-level="10" text:use-outline-level="false" text:use-index-marks="false" text:use-index-source-styles="true">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left" style:position="0in"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left" style:position="0in"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on-Poetry_20_Title"/>
          </text:index-source-styles>
          <text:index-source-styles text:outline-level="2">
            <text:index-source-style text:style-name="Poetry_20_Title"/>
          </text:index-source-styles>
        </text:table-of-content-source>
        <text:index-body>
          <text:index-title text:style-name="Sect1" text:name="Table of Contents1_Head">
            <text:p text:style-name="Contents_20_Heading">Contents</text:p>
          </text:index-title>
          <text:p text:style-name="P9"><text:a xlink:type="simple" xlink:href="#__RefHeading___Toc1293_3676532460" office:name="Preface" text:style-name="Index_20_Link" text:visited-style-name="Index_20_Link">Preface<text:tab/>VII</text:a></text:p>
          <text:p text:style-name="P9"/>
          <text:p text:style-name="P10"><text:a xlink:type="simple" xlink:href="#__RefHeading___Toc155_3645116443" office:name="Hello Ollie," text:style-name="Index_20_Link" text:visited-style-name="Index_20_Link">Hello Ollie,<text:tab/>1</text:a></text:p>
          <text:p text:style-name="P10"><text:a xlink:type="simple" xlink:href="#__RefHeading___Toc784_3676532460" office:name="What Have I Done" text:style-name="Index_20_Link" text:visited-style-name="Index_20_Link">What Have I Done<text:tab/>2</text:a></text:p>
          <text:p text:style-name="P10"><text:a xlink:type="simple" xlink:href="#__RefHeading___Toc782_3676532460" office:name="A Conversation In Emoticons" text:style-name="Index_20_Link" text:visited-style-name="Index_20_Link">A Conversation In Emoticons<text:tab/>3</text:a></text:p>
          <text:p text:style-name="P10"><text:a xlink:type="simple" xlink:href="#__RefHeading___Toc780_3676532460" office:name="Be Normal" text:style-name="Index_20_Link" text:visited-style-name="Index_20_Link">Be Normal<text:tab/>4</text:a></text:p>
          <text:p text:style-name="P10"><text:a xlink:type="simple" xlink:href="#__RefHeading___Toc778_3676532460" office:name="Ollie Ollie Ollie Ollie Ollie Ollie Ollie Ollie" text:style-name="Index_20_Link" text:visited-style-name="Index_20_Link">Ollie Ollie Ollie Ollie Ollie Ollie Ollie Ollie<text:tab/>5</text:a></text:p>
          <text:p text:style-name="P10"><text:a xlink:type="simple" xlink:href="#__RefHeading___Toc820_3326894427" office:name="Soapstone" text:style-name="Index_20_Link" text:visited-style-name="Index_20_Link">Soapstone<text:tab/>6</text:a></text:p>
          <text:p text:style-name="P10"><text:a xlink:type="simple" xlink:href="#__RefHeading___Toc818_3326894427" office:name="Another Place, Another time" text:style-name="Index_20_Link" text:visited-style-name="Index_20_Link">Another Place, Another time<text:tab/>7</text:a></text:p>
          <text:p text:style-name="P10"><text:a xlink:type="simple" xlink:href="#__RefHeading___Toc1025_1230340041" office:name="I’m Not Struggling" text:style-name="Index_20_Link" text:visited-style-name="Index_20_Link">I’m Not Struggling<text:tab/>8</text:a></text:p>
          <text:p text:style-name="P10"><text:a xlink:type="simple" xlink:href="#__RefHeading___Toc1023_1230340041" office:name="Between My Ears I Cannot Sing" text:style-name="Index_20_Link" text:visited-style-name="Index_20_Link">Between My Ears I Cannot Sing<text:tab/>10</text:a></text:p>
          <text:p text:style-name="P10"><text:a xlink:type="simple" xlink:href="#__RefHeading___Toc776_3676532460" office:name="Goodbye Ollie," text:style-name="Index_20_Link" text:visited-style-name="Index_20_Link">Goodbye Ollie,<text:tab/>12</text:a></text:p>
        </text:index-body>
      </text:table-of-content>
      <text:p text:style-name="P11"/>
      <text:p text:style-name="P12"/>
      <text:p text:style-name="P13"><text:bookmark-start text:name="__RefHeading___Toc1293_3676532460"/>Preface<text:bookmark-end text:name="__RefHeading___Toc1293_3676532460"/></text:p>
      <text:p text:style-name="P14"/>
      <text:p text:style-name="P15"><text:span text:style-name="T2">The sum total of this book amounts to nothing but a joke. I refuse to stop telling this joke all on the grounds that I find it funny. I’ve lately been stopping myself in the middle of this joke, because I think it’s in bad taste now that Ollie’s escaped me. I’ve reached my bounds. A book I reread recently captures what I hope to present through this collection</text:span>:</text:p>
      <text:p text:style-name="Quote"/>
      <text:p text:style-name="Quote">All of the true things I am about to tell you are shameless lies.</text:p>
      <text:p text:style-name="Quote"><text:span text:style-name="T3">—</text:span><text:span text:style-name="T4">Kurt Vonnegut, Jr., </text:span><text:span text:style-name="T2">Cat’s Cradle</text:span></text:p>
      <text:p text:style-name="P16"/>
      <text:p text:style-name="P17">Nothing in these pages are true. Everything I’ve written comes from my heart and what I believe to be somewhat funny, or a little interesting. That probably means there’s something true in here, but that’s not up to me to decide.</text:p>
      <text:p text:style-name="P17"/>
      <text:p text:style-name="P17">Otherwise, all writing was formed with a single thought in mind: “How do I make Ollie a little uncomfortable here, but still willing to laugh about it?” If I hit the mark, you’ll know.</text:p>
      <text:p text:style-name="P18"/>
      <text:p text:style-name="P19"><text:span text:style-name="T2">As a final </text:span><text:span text:style-name="T5">note on why I did this</text:span><text:span text:style-name="T2">, </text:span><text:span text:style-name="T5">t</text:span><text:span text:style-name="T6">here’s </text:span><text:span text:style-name="T7">nothing</text:span><text:span text:style-name="T6"> wrong with wanting to be an individual. </text:span><text:span text:style-name="T2">The only thing wrong is to </text:span><text:span text:style-name="T5">not </text:span><text:span text:style-name="T2">try.</text:span></text:p>
      <text:p text:style-name="P19"/>
      <text:p text:style-name="P19"><text:span text:style-name="T2">So that’s what I hope to get across here: I’m trying. I tried. </text:span><text:span text:style-name="T5">If I failed, better than those that never pursued a thought to its end.</text:span></text:p>
      <text:p text:style-name="P19"/>
      <text:p text:style-name="P20">Thank you.</text:p>
      <text:p text:style-name="P21"/>
      <text:p text:style-name="P7"/>
      <text:p text:style-name="Text_20_body"/>
      <text:p text:style-name="Text_20_body"/>
      <text:p text:style-name="Text_20_body"/>
      <text:p text:style-name="P22">I aint ever felt better and</text:p>
      <text:p text:style-name="P22">I aint ever been dumbe<text:span text:style-name="T1">r.</text:span></text:p>
      <text:p text:style-name="P23"><text:span text:style-name="T8">—</text:span><text:span text:style-name="T9">Jesse Welles</text:span></text:p>
      <text:p text:style-name="P24"/>
      <text:p text:style-name="P25">To give anything less than your best</text:p>
      <text:p text:style-name="P25">is to sacrifice the gift.</text:p>
      <text:p text:style-name="P26">—<text:span text:style-name="T10">Steve Prefontaine</text:span></text:p>
      <text:p text:style-name="P23"/>
      <text:p text:style-name="P27"><text:span text:style-name="Emphasis">I can’t even guess myself what it must be</text:span></text:p>
      <text:p text:style-name="P27"><text:span text:style-name="Emphasis">to live the life of a human being.</text:span></text:p>
      <text:p text:style-name="P23"><text:span text:style-name="Emphasis"><text:span text:style-name="T11">—</text:span></text:span><text:span text:style-name="Emphasis"><text:span text:style-name="T12">Osamu Dazai, </text:span></text:span><text:span text:style-name="Emphasis"><text:span text:style-name="T13">No Longer Human</text:span></text:span></text:p>
      <text:p text:style-name="P23"><text:span text:style-name="Emphasis"><text:span text:style-name="T13"/></text:span></text:p>
      <text:p text:style-name="P28">See the cat?</text:p>
      <text:p text:style-name="P29"><text:span text:style-name="Emphasis"><text:span text:style-name="T14">See the cradle?</text:span></text:span></text:p>
      <text:p text:style-name="P29"><text:span text:style-name="Emphasis"><text:span text:style-name="T11">—Kurt Vonnegut, Jr., </text:span></text:span><text:span text:style-name="Emphasis"><text:span text:style-name="T14">Cat’s Cradle</text:span></text:span></text:p>
      <text:p text:style-name="P23"><text:span text:style-name="Emphasis"><text:span text:style-name="T12"/></text:span></text:p>
      <text:p text:style-name="P30"><text:span text:style-name="Emphasis"><text:span text:style-name="T15">I don’t want to be normal,</text:span></text:span></text:p>
      <text:p text:style-name="P30"><text:span text:style-name="Emphasis"><text:span text:style-name="T15">I want to be me</text:span></text:span><text:span text:style-name="Emphasis">.</text:span></text:p>
      <text:p text:style-name="P30"><text:span text:style-name="Emphasis"><text:span text:style-name="T12">—</text:span></text:span><text:span text:style-name="Emphasis"><text:span text:style-name="T16">My Brain</text:span></text:span></text:p>
      <text:p text:style-name="P31" loext:marker-style-name="T17"><text:span text:style-name="T17"/></text:p>
      <text:p text:style-name="Text_20_body"/>
      <text:p text:style-name="P32"><text:bookmark-start text:name="__RefHeading___Toc155_3645116443"/><office:annotation office:name="__Annotation__441_2779579312" loext:resolved="false"><dc:creator>Vladimir Herdman</dc:creator><dc:date>2026-05-09T23:32:14.079003000</dc:date><meta:creator-initials>VTH</meta:creator-initials><text:p text:style-name="Comment">I’m thinking overly positive from here, to goofy/weird, to whatever I want towards the end of the book here.</text:p><text:p text:style-name="Comment"/></office:annotation>Hello Ollie<office:annotation-end office:name="__Annotation__441_2779579312"/>,<text:bookmark-end text:name="__RefHeading___Toc155_3645116443"/></text:p>
      <text:p text:style-name="Poetry_20_Text"/>
      <text:p text:style-name="P33">Hello Ollie,</text:p>
      <text:p text:style-name="P33"/>
      <text:p text:style-name="P33">From the first moment I met you I—</text:p>
      <text:p text:style-name="P33">When we met that fated August eve, I really wanted to just—</text:p>
      <text:p text:style-name="P33">Ollie, the effect you’ve had on me, truly...</text:p>
      <text:p text:style-name="P33"/>
      <text:p text:style-name="P33">I just can’t start this letter to you. I feel I can’t speak my mind. I don’t have the words to express myself, and I keep restarting. So, that’s what this book is for.</text:p>
      <text:p text:style-name="P33"/>
      <text:p text:style-name="P33">I plan on expressing some emotions— or thoughts— at least somewhere within this piece, ideas I couldn’t fully write out, ideas I had to keep rewriting ‘till I finally gave up.</text:p>
      <text:p text:style-name="P33"/>
      <text:p text:style-name="P33">This book, and every poem, is an attempt <text:span text:style-name="T18">a</text:span>t <text:span text:style-name="T18">some</text:span> <text:span text:style-name="T18">nebulous feeling within me</text:span>. Whether you call it poetry or not, that’s why the cover says this is a collection of “Maybe-Poems.” Got all my bases covered.</text:p>
      <text:p text:style-name="P33"/>
      <text:p text:style-name="P33">I hope you enjoy it! I hope it’s not too weird! I hope…</text:p>
      <text:p text:style-name="P33"/>
      <text:p text:style-name="P33">I hope you thought it was funny.</text:p>
      <text:p text:style-name="P33"/>
      <text:p text:style-name="P33">Sincerely,</text:p>
      <text:p text:style-name="P33">Dare I say lovingly,</text:p>
      <text:p text:style-name="P33">I dare,</text:p>
      <text:p text:style-name="P33">I do dare,</text:p>
      <text:p text:style-name="P33">Vova</text:p>
      <text:p text:style-name="P34"><text:bookmark-start text:name="__RefHeading___Toc784_3676532460"/>What Have I Done<text:bookmark-end text:name="__RefHeading___Toc784_3676532460"/></text:p>
      <text:p text:style-name="P35"/>
      <text:p text:style-name="P35"/>
      <text:p text:style-name="P35"/>
      <text:p text:style-name="P35"/>
      <text:p text:style-name="P35"><text:s text:c="8"/><text:span text:style-name="T19">a <text:s text:c="47"/>ft <text:s text:c="31"/>s <text:s/>h</text:span></text:p>
      <text:p text:style-name="P36"><text:s text:c="2"/>wh <text:s text:c="3"/>t <text:s/>do I e <text:s text:c="2"/>en <text:s text:c="2"/>s ay to y o <text:s/>u <text:s/>a <text:s text:c="2"/>er <text:s text:c="30"/>am e</text:p>
      <text:p text:style-name="P36">suc h <text:s/>a m <text:s text:c="6"/>v <text:s text:c="2"/>I’v e <text:s text:c="6"/>ad e. My hea rt we t <text:s text:c="14"/>on th e</text:p>
      <text:p text:style-name="P36"><text:s text:c="5"/>agai nst ess <text:s text:c="16"/>m <text:s text:c="20"/>o <text:s/>c <text:s text:c="27"/>w a</text:p>
      <text:p text:style-name="P36"><text:s text:c="16"/>th e <text:s text:c="5"/>an <text:s text:c="3"/>I <text:s text:c="10"/>try in g <text:s text:c="2"/>t <text:s text:c="5"/>le <text:s text:c="29"/>l</text:p>
      <text:p text:style-name="P36"><text:s text:c="20"/>w <text:s text:c="7"/>d <text:s text:c="5"/>c <text:s text:c="30"/>an <text:s text:c="29"/>l</text:p>
      <text:p text:style-name="P36"><text:s text:c="19"/>a <text:s text:c="18"/>an <text:s text:c="30"/>up</text:p>
      <text:p text:style-name="P36"><text:s text:c="18"/>l <text:s text:c="22"/>‘t <text:s text:c="33"/>.</text:p>
      <text:p text:style-name="P36"><text:s text:c="20"/>l <text:s text:c="21"/>s</text:p>
      <text:p text:style-name="P36"><text:s text:c="45"/>to</text:p>
      <text:p text:style-name="P36"><text:s text:c="50"/>p</text:p>
      <text:p text:style-name="P36"/>
      <text:p text:style-name="P36"/>
      <text:p text:style-name="P36"><text:s text:c="65"/>We t an</text:p>
      <text:p text:style-name="P36"><text:s text:c="76"/>d</text:p>
      <text:p text:style-name="P36"><text:s text:c="73"/>dr I p</text:p>
      <text:p text:style-name="P36"><text:s text:c="81"/>pin g</text:p>
      <text:p text:style-name="P36"><text:s text:c="65"/>do w</text:p>
      <text:p text:style-name="P36"><text:s text:c="73"/>n <text:s text:c="2"/>t h</text:p>
      <text:p text:style-name="P36"><text:s text:c="83"/>e</text:p>
      <text:p text:style-name="P36"><text:s text:c="81"/>p</text:p>
      <text:p text:style-name="P36"><text:s text:c="84"/>a</text:p>
      <text:p text:style-name="P36"><text:s text:c="82"/>g</text:p>
      <text:p text:style-name="P36"><text:s text:c="88"/>e</text:p>
      <text:p text:style-name="P37"><text:bookmark-start text:name="__RefHeading___Toc782_3676532460"/>A Conversation In Emoticons<text:bookmark-end text:name="__RefHeading___Toc782_3676532460"/></text:p>
      <text:p text:style-name="P38"/>
      <text:p text:style-name="P38">\ (,,-_-,,) /</text:p>
      <text:p text:style-name="P37"><text:bookmark-start text:name="__RefHeading___Toc780_3676532460"/>Be Normal<text:bookmark-end text:name="__RefHeading___Toc780_3676532460"/></text:p>
      <text:p text:style-name="Poetry_20_Text"/>
      <text:p text:style-name="Poetry_20_Text">I don’t want to be normal,</text:p>
      <text:p text:style-name="Poetry_20_Text">I want to be me.</text:p>
      <text:p text:style-name="Poetry_20_Text"/>
      <text:p text:style-name="Poetry_20_Text">Isn’t that enough?</text:p>
      <text:p text:style-name="P39"><text:bookmark-start text:name="__RefHeading___Toc778_3676532460"/>Ollie Ollie Ollie Ollie Ollie Ollie Ollie Ollie<text:bookmark-end text:name="__RefHeading___Toc778_3676532460"/></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Vova<text:span text:style-name="T20"> </text:span>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37"><text:bookmark-start text:name="__RefHeading___Toc820_3326894427"/>Soapstone<text:bookmark-end text:name="__RefHeading___Toc820_3326894427"/></text:p>
      <text:p text:style-name="P40"/>
      <text:p text:style-name="P40">My heart is one of those</text:p>
      <text:p text:style-name="P40">smooth stones,</text:p>
      <text:p text:style-name="P40">hard to hold</text:p>
      <text:p text:style-name="P40">and easy to drop—</text:p>
      <text:p text:style-name="P40">to drop hard.</text:p>
      <text:p text:style-name="P40">It’ll slip right through</text:p>
      <text:p text:style-name="P40">your shaking fingers as you</text:p>
      <text:p text:style-name="P41">squeeze to the rhythm</text:p>
      <text:p text:style-name="P41"><text:span text:style-name="T21">and keep me alive</text:span>.</text:p>
      <text:p text:style-name="P40"/>
      <text:p text:style-name="P40">My stone is like oil</text:p>
      <text:p text:style-name="P40">and won’t mix</text:p>
      <text:p text:style-name="P40">with your water,</text:p>
      <text:p text:style-name="P40">no matter how much</text:p>
      <text:p text:style-name="P40">we hold on.</text:p>
      <text:p text:style-name="P40"/>
      <text:p text:style-name="P40">I only make</text:p>
      <text:p text:style-name="P40">myself clean</text:p>
      <text:p text:style-name="P42">slipping through</text:p>
      <text:p text:style-name="P43">your fingers.</text:p>
      <text:p text:style-name="P37"><text:bookmark-start text:name="__RefHeading___Toc818_3326894427"/>Another Place, Another time<text:bookmark-end text:name="__RefHeading___Toc818_3326894427"/></text:p>
      <text:p text:style-name="P42"/>
      <text:p text:style-name="P42">Are you <text:span text:style-name="T22">waiting</text:span>,</text:p>
      <text:p text:style-name="P42">are you out there;</text:p>
      <text:p text:style-name="P42"/>
      <text:p text:style-name="P42">Pushing off the now</text:p>
      <text:p text:style-name="P42">and thinking of...</text:p>
      <text:p text:style-name="P42"/>
      <text:p text:style-name="P42">Check back again</text:p>
      <text:p text:style-name="P42">after I've made it.</text:p>
      <text:p text:style-name="P42"/>
      <text:p text:style-name="P42">When we meet, <text:s/>when I, <text:s text:c="3"/>when I,</text:p>
      <text:p text:style-name="P42">when I see you.</text:p>
      <text:p text:style-name="P42"/>
      <text:p text:style-name="P42">There's tomorrow—</text:p>
      <text:p text:style-name="P42">always tomorrow.</text:p>
      <text:p text:style-name="P42"/>
      <text:p text:style-name="P42">Promise.</text:p>
      <text:p text:style-name="P37"><text:bookmark-start text:name="__RefHeading___Toc1025_1230340041"/>I’m Not Struggling<text:bookmark-end text:name="__RefHeading___Toc1025_1230340041"/></text:p>
      <text:p text:style-name="P42"/>
      <text:p text:style-name="P42">All the media I watch</text:p>
      <text:p text:style-name="P42">portrays love as a struggle</text:p>
      <text:p text:style-name="P42">of wills against some force,</text:p>
      <text:p text:style-name="P42">of conflict and resolution—</text:p>
      <text:p text:style-name="P42">a drama.</text:p>
      <text:p text:style-name="P42"/>
      <text:p text:style-name="P42">The protagonists come together,</text:p>
      <text:p text:style-name="P42">and through their struggle</text:p>
      <text:p text:style-name="P42">against some other force,</text:p>
      <text:p text:style-name="P42">learn to love eachother,</text:p>
      <text:p text:style-name="P42">strengthen their bonds,</text:p>
      <text:p text:style-name="P42">and form resolute declarations</text:p>
      <text:p text:style-name="P42">of understanding about the other<text:span text:style-name="T23">s</text:span>,</text:p>
      <text:p text:style-name="P42">as can only be learnt from</text:p>
      <text:p text:style-name="P42">facing hell with someone.</text:p>
      <text:p text:style-name="P42"/>
      <text:p text:style-name="P42">I <text:span text:style-name="T23">f</text:span>eel in myself a desire</text:p>
      <text:p text:style-name="P42">for <text:span text:style-name="T23">your</text:span> time, <text:span text:style-name="T23">but</text:span></text:p>
      <text:p text:style-name="P42">I don't think it's love,</text:p>
      <text:p text:style-name="P44">I don’t think it’d last after the first date.</text:p>
      <text:p text:style-name="P42"><text:span text:style-name="T23">M</text:span>aybe that's the culture in me,</text:p>
      <text:p text:style-name="P42">based off what I consume.</text:p>
      <text:p text:style-name="P42">I've broken my ability to love wholly,</text:p>
      <text:p text:style-name="P42">because I'm incapable of loving</text:p>
      <text:p text:style-name="P42">when times are good.</text:p>
      <text:p text:style-name="P42"/>
      <text:p text:style-name="P42">I love when it's bad.</text:p>
      <text:p text:style-name="P42">I don't have many issues,</text:p>
      <text:p text:style-name="P42">and I'm afraid to be</text:p>
      <text:p text:style-name="P42"><text:soft-page-break/>incapable of love.</text:p>
      <text:p text:style-name="P42"/>
      <text:p text:style-name="P42">Am I lonely,</text:p>
      <text:p text:style-name="P42">or forcing myself to...</text:p>
      <text:p text:style-name="P42"/>
      <text:p text:style-name="P42">What do I like.</text:p>
      <text:p text:style-name="P42"/>
      <text:p text:style-name="P42"/>
      <text:p text:style-name="P42">I'm disgusting.</text:p>
      <text:p text:style-name="P45"/>
      <text:p text:style-name="P45"/>
      <text:p text:style-name="P45"/>
      <text:p text:style-name="P45"/>
      <text:p text:style-name="P45">And I think I’m happy.</text:p>
      <text:p text:style-name="P37"><text:bookmark-start text:name="__RefHeading___Toc1023_1230340041"/>Between My Ears I Cannot Sing<text:bookmark-end text:name="__RefHeading___Toc1023_1230340041"/></text:p>
      <text:p text:style-name="P45"/>
      <text:p text:style-name="Poetry_20_Text">As you walked away</text:p>
      <text:p text:style-name="Poetry_20_Text"/>
      <text:p text:style-name="P46"><text:tab/>It was my heart that first beat out of my chest. Slapping onto the floor, it kept pulsing while my teeth fell out and my skin sloughed off and my bones jumped out the hole in my chest and the organs and liquids without their cage poured from me an ungodly spray of everything else wet and human.</text:p>
      <text:p text:style-name="P47"><text:tab/>All around, the ensemble started to their sections. My large intestine and colon formed the chairs as the small hand bones made stands for hairy sheet music. Muscle fibers unwound and rewrapped around the jaw bone to form the strings. My lungs, teeth and larynx became the choir, while the dome of my skull was used as a drum. My blood boiled and congealed with my lips into the brasses.</text:p>
      <text:p text:style-name="P47"><text:tab/>At the very center, my heart pumped erect as the conductor. Holding one of the tiny bones from my foot I can never remember the name of, it started waving the baton in common time as the orchestra reared and let out my innermost secrets and desires. </text:p>
      <text:p text:style-name="P47"><text:tab/>My eyes, used to furtive glances, now drowned in your sight burnt onto my skin. My ears listened for the first time to ideas I never gave a second chance to, having always caught them at the back of my throat, which now sang with my teeth the secrets I never got to share about everything extraordinary, beautiful, and you. Fingers flexed for a missed touch with drumsticks beating the head that hid it all, while the respiratory flutes flauted my longing at a crescendo.</text:p>
      <text:p text:style-name="P47"><text:soft-page-break/><text:tab/>These birth-tuned instruments played their misuses, and I could only flap my folds in opposition. I tried to convey through movement every fault I ever had and every reason to avoid me and how I don’t think the sea will sing to me when familiar hands grabbed the conductor as I realized how perfect we would be together if only it was</text:p>
      <text:p text:style-name="Poetry_20_Text"/>
      <text:p text:style-name="Poetry_20_Text">without me.</text:p>
      <text:p text:style-name="P37">Instagramification <text:span text:style-name="T24">I </text:span>– No Time And Nothing To Do</text:p>
      <text:p text:style-name="P48"/>
      <text:p text:style-name="P48">I've really got</text:p>
      <text:p text:style-name="P48">nothing to do,</text:p>
      <text:p text:style-name="P48">and so little time</text:p>
      <text:p text:style-name="P48">to do it.</text:p>
      <text:p text:style-name="P37"><text:bookmark-start text:name="__RefHeading___Toc776_3676532460"/>Goodbye Ollie,<text:bookmark-end text:name="__RefHeading___Toc776_3676532460"/></text:p>
      <text:p text:style-name="P49"/>
      <text:p text:style-name="Poetry_20_Text">I feel utterly and irrefutably incapable of expressing myself fully within the bounds of the language I have grown up with. One of my greatest fears is that I am a wholly uni-faceted individual with no complex emotions and extreme predictability in my actions.</text:p>
      <text:p text:style-name="Poetry_20_Text"/>
      <text:p text:style-name="Poetry_20_Text">Maybe I’m not all that afraid of being unable to express myself, but that there’s nothing to express. I’m afraid of being nothing, that I have no dramatic knots in my living cords.</text:p>
      <text:p text:style-name="Poetry_20_Text"/>
      <text:p text:style-name="Poetry_20_Text">I’m sorry for making any of this. It was a waste of time, and I’ve only made myself sadder. I will one day be my undoing. Everything I say is a lie, and just a way to convince myself there’s something more to who I am. Forgive my reachings and idiosyncrasies for what they are, a lack of character and a desire for what I don’t have.</text:p>
      <text:p text:style-name="Poetry_20_Text"/>
      <text:p text:style-name="Poetry_20_Text">Sincerely,</text:p>
      <text:p text:style-name="Poetry_20_Text">Vov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Times New Roman" fo:font-family="'Times New Roman'" style:font-family-generic="roman"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575in" style:contextual-spacing="false" fo:line-height="115%"/>
      <style:text-properties officeooo:rsid="001ca094"/>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Header" style:family="paragraph" style:parent-style-name="Header_20_and_20_Footer" style:class="extra">
      <style:paragraph-properties text:number-lines="false" text:line-number="0">
        <style:tab-stops>
          <style:tab-stop style:position="2.25in" style:type="center"/>
          <style:tab-stop style:position="4.5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2.25in" style:type="center"/>
          <style:tab-stop style:position="4.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Quote" style:family="paragraph" style:parent-style-name="Text_20_body">
      <style:paragraph-properties fo:text-align="right" style:justify-single-word="false"/>
      <style:text-properties fo:font-style="italic" style:font-style-asian="italic" style:font-style-complex="italic"/>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Poetry_20_Title" style:display-name="Poetry Title" style:family="paragraph" style:parent-style-name="Text_20_body">
      <style:paragraph-properties fo:margin-top="0in" fo:margin-bottom="0in" style:contextual-spacing="false"/>
      <style:text-properties fo:font-size="16pt" fo:font-weight="bold" officeooo:rsid="0014dda8"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4.5in" style:type="right" style:leader-style="dotted" style:leader-text="."/>
        </style:tab-stops>
      </style:paragraph-properties>
    </style:style>
    <style:style style:name="Poetry_20_Text" style:display-name="Poetry Text" style:family="paragraph" style:parent-style-name="Text_20_body">
      <style:paragraph-properties fo:margin-top="0in" fo:margin-bottom="0in" style:contextual-spacing="false">
        <style:tab-stops>
          <style:tab-stop style:position="1.502in"/>
          <style:tab-stop style:position="2.3626in"/>
        </style:tab-stops>
      </style:paragraph-properties>
      <style:text-properties officeooo:rsid="0037de52"/>
    </style:style>
    <style:style style:name="Non-Poetry_20_Title" style:display-name="Non-Poetry Title" style:family="paragraph" style:parent-style-name="Text_20_body">
      <style:text-properties fo:font-size="16pt" fo:font-weight="bold" officeooo:rsid="0017f519"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4.303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right" style:justify-single-word="false"/>
    </style:style>
    <style:style style:name="MP2" style:family="paragraph" style:parent-style-name="Header_20_left">
      <style:paragraph-properties fo:text-align="left" style:justify-single-word="false"/>
    </style:style>
    <style:page-layout style:name="Mpm1" style:page-usage="mirrored">
      <style:page-layout-properties fo:page-width="5.5in" fo:page-height="8.5in" style:num-format="1" style:print-orientation="portrait" fo:margin-top="0.5in" fo:margin-bottom="0.5in" fo:margin-left="0.5in" fo:margin-right="0.5in" fo:border="none" fo:padding="0.02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5.5in" fo:page-height="8.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5.5in" fo:page-height="8.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5.5in" fo:page-height="8.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5.5in" fo:page-height="8.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5.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mirrored">
      <style:page-layout-properties fo:page-width="5.5in" fo:page-height="8.5in" style:num-format="I" style:print-orientation="portrait" fo:margin-top="0.5in" fo:margin-bottom="0.5in" fo:margin-left="0.5in" fo:margin-right="0.5in" fo:border="none" fo:padding="0.02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9">
      <style:page-layout-properties fo:page-width="5.5in" fo:page-height="8.5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Header_20_left"/>
      </style:head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dnote" loext:hidden="true" style:hidden="true" style:page-layout-name="Mpm5" draw:style-name="Mdp1"/>
    <style:master-page style:name="Envelope" loext:hidden="true" style:hidden="true" style:page-layout-name="Mpm6" draw:style-name="Mdp1"/>
    <style:master-page style:name="Index" loext:hidden="true" style:hidden="true" style:page-layout-name="Mpm2" draw:style-name="Mdp1"/>
    <style:master-page style:name="Landscape" loext:hidden="true" style:hidden="true" style:page-layout-name="Mpm7" draw:style-name="Mdp1"/>
    <style:master-page style:name="Frontmatter" style:page-layout-name="Mpm8" draw:style-name="Mdp1">
      <style:header>
        <text:p text:style-name="MP1"><text:bookmark text:name="PageNumWizard_HEADER_Frontmatter-numbered5 Copy 5"/></text:p>
      </style:header>
      <style:header-left>
        <text:p text:style-name="MP2"><text:bookmark text:name="PageNumWizard_HEADER_Frontmatter-numbered5 Copy 5 Copy 27"/><text:bookmark text:name="PageNumWizard_HEADER_Frontmatter-numbered5 Copy 5 Copy 25"/><text:bookmark text:name="PageNumWizard_HEADER_Frontmatter-numbered5 Copy 5 Copy 23"/><text:bookmark text:name="PageNumWizard_HEADER_Frontmatter-numbered5 Copy 5 Copy 21"/><text:bookmark text:name="PageNumWizard_HEADER_Frontmatter-numbered5 Copy 5 Copy 19"/><text:bookmark text:name="PageNumWizard_HEADER_Frontmatter-numbered5 Copy 5 Copy 17"/><text:bookmark text:name="PageNumWizard_HEADER_Frontmatter-numbered5 Copy 5 Copy 15"/><text:bookmark text:name="PageNumWizard_HEADER_Frontmatter-numbered5 Copy 5 Copy 13"/><text:bookmark text:name="PageNumWizard_HEADER_Frontmatter-numbered5 Copy 5 Copy 11"/><text:bookmark text:name="PageNumWizard_HEADER_Frontmatter-numbered5 Copy 5 Copy 9"/><text:bookmark text:name="PageNumWizard_HEADER_Frontmatter-numbered5 Copy 5 Copy 7"/><text:bookmark text:name="PageNumWizard_HEADER_Frontmatter-numbered5 Copy 5 Copy 5"/><text:bookmark text:name="PageNumWizard_HEADER_Frontmatter-numbered5 Copy 5 Copy 3"/><text:bookmark text:name="PageNumWizard_HEADER_Frontmatter-numbered5 Copy 5 Copy 1"/><text:bookmark text:name="PageNumWizard_HEADER_Frontmatter-numbered6 Copy 5"/><text:bookmark text:name="PageNumWizard_HEADER_Frontmatter-numbered5 Copy 5 Copy 2"/><text:bookmark text:name="PageNumWizard_HEADER_Frontmatter-numbered5 Copy 5 Copy 4"/><text:bookmark text:name="PageNumWizard_HEADER_Frontmatter-numbered5 Copy 5 Copy 6"/><text:bookmark text:name="PageNumWizard_HEADER_Frontmatter-numbered5 Copy 5 Copy 8"/><text:bookmark text:name="PageNumWizard_HEADER_Frontmatter-numbered5 Copy 5 Copy 10"/><text:bookmark text:name="PageNumWizard_HEADER_Frontmatter-numbered5 Copy 5 Copy 12"/><text:bookmark text:name="PageNumWizard_HEADER_Frontmatter-numbered5 Copy 5 Copy 14"/><text:bookmark text:name="PageNumWizard_HEADER_Frontmatter-numbered5 Copy 5 Copy 16"/><text:bookmark text:name="PageNumWizard_HEADER_Frontmatter-numbered5 Copy 5 Copy 18"/><text:bookmark text:name="PageNumWizard_HEADER_Frontmatter-numbered5 Copy 5 Copy 20"/><text:bookmark text:name="PageNumWizard_HEADER_Frontmatter-numbered5 Copy 5 Copy 22"/><text:bookmark text:name="PageNumWizard_HEADER_Frontmatter-numbered5 Copy 5 Copy 24"/><text:bookmark text:name="PageNumWizard_HEADER_Frontmatter-numbered5 Copy 5 Copy 26"/></text:p>
      </style:header-left>
    </style:master-page>
    <style:master-page style:name="HTML" style:page-layout-name="Mpm9" draw:style-name="Mdp1"/>
    <style:master-page style:name="Footnote" style:page-layout-name="Mpm5" draw:style-name="Mdp1"/>
    <style:master-page style:name="Frontmatter-numbered" style:page-layout-name="Mpm8" draw:style-name="Mdp1">
      <style:header>
        <text:p text:style-name="MP1"><text:bookmark-start text:name="PageNumWizard_HEADER_Frontmatter-numbered5"/><text:page-number text:select-page="current">VII</text:page-number><text:bookmark-end text:name="PageNumWizard_HEADER_Frontmatter-numbered5"/></text:p>
      </style:header>
      <style:header-left>
        <text:p text:style-name="MP2"><text:bookmark-start text:name="PageNumWizard_HEADER_Frontmatter-numbered6"/><text:page-number text:select-page="current">0</text:page-number><text:bookmark-end text:name="PageNumWizard_HEADER_Frontmatter-numbered6"/></text:p>
      </style:header-left>
    </style:master-page>
    <style:master-page style:name="Poetry" style:page-layout-name="Mpm1" draw:style-name="Mdp1">
      <style:header>
        <text:p text:style-name="MP1"><text:bookmark-start text:name="PageNumWizard_HEADER_Poetry11"/><text:page-number text:select-page="current">13</text:page-number><text:bookmark-end text:name="PageNumWizard_HEADER_Poetry11"/></text:p>
      </style:header>
      <style:header-left>
        <text:p text:style-name="MP2"><text:bookmark-start text:name="PageNumWizard_HEADER_Poetry10"/><text:page-number text:select-page="current">12</text:page-number><text:bookmark-end text:name="PageNumWizard_HEADER_Poetry10"/></text:p>
      </style:head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6T22:18:00.969720000</meta:creation-date>
    <dc:date>2026-06-15T19:20:42.535490000</dc:date>
    <meta:editing-duration>PT2H42M43S</meta:editing-duration>
    <meta:editing-cycles>51</meta:editing-cycles>
    <meta:generator>LibreOffice/26.2.3.2$MacOSX_AARCH64 LibreOffice_project/70e089b17412e4cb7773e41413306b17a2328c34</meta:generator>
    <dc:creator>Vladimir Herdman</dc:creator>
    <meta:document-statistic meta:table-count="0" meta:image-count="0" meta:object-count="0" meta:page-count="23" meta:paragraph-count="201" meta:word-count="1759" meta:character-count="10721" meta:non-whitespace-character-count="7635"/>
  </office:meta>
</office:document-meta>
</file>