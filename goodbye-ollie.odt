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master-page-name="Frontmatter">
      <style:paragraph-properties fo:text-align="center" style:justify-single-word="false" style:page-number="auto"/>
      <style:text-properties officeooo:rsid="0011bcbf" officeooo:paragraph-rsid="0011bcbf"/>
    </style:style>
    <style:style style:name="P2" style:family="paragraph" style:parent-style-name="Standard">
      <style:paragraph-properties fo:text-align="justify" style:justify-single-word="false" fo:break-before="page"/>
      <style:text-properties officeooo:rsid="0011bcbf" officeooo:paragraph-rsid="0011bcbf"/>
    </style:style>
    <style:style style:name="P3" style:family="paragraph" style:parent-style-name="Standard">
      <style:paragraph-properties fo:text-align="justify" style:justify-single-word="false"/>
      <style:text-properties officeooo:rsid="0011bcbf" officeooo:paragraph-rsid="0011bcbf"/>
    </style:style>
    <style:style style:name="P4" style:family="paragraph" style:parent-style-name="Standard">
      <style:paragraph-properties fo:text-align="justify" style:justify-single-word="false"/>
      <style:text-properties fo:font-size="32pt" fo:font-weight="bold" officeooo:rsid="0011bcbf" officeooo:paragraph-rsid="0011bcbf" style:font-size-asian="32pt" style:font-weight-asian="bold" style:font-size-complex="3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32pt" fo:font-weight="bold" officeooo:rsid="0011bcbf" officeooo:paragraph-rsid="0011bcbf" style:font-size-asian="32pt" style:font-weight-asian="bold" style:font-size-complex="3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style="italic" officeooo:rsid="0011bcbf" officeooo:paragraph-rsid="0011bcbf" style:font-size-asian="16pt" style:font-style-asian="italic" style:font-size-complex="16pt" style:font-style-complex="italic"/>
    </style:style>
    <style:style style:name="P7" style:family="paragraph" style:parent-style-name="Text_20_body">
      <style:paragraph-properties fo:break-before="page"/>
      <style:text-properties officeooo:rsid="0014dda8" officeooo:paragraph-rsid="0014dda8"/>
    </style:style>
    <style:style style:name="P8" style:family="paragraph" style:parent-style-name="Text_20_body">
      <style:text-properties officeooo:paragraph-rsid="0014dda8"/>
    </style:style>
    <style:style style:name="P9" style:family="paragraph" style:parent-style-name="Contents_20_1">
      <style:paragraph-properties>
        <style:tab-stops>
          <style:tab-stop style:position="4.4591in" style:type="right" style:leader-style="dotted" style:leader-text="."/>
        </style:tab-stops>
      </style:paragraph-properties>
    </style:style>
    <style:style style:name="P10" style:family="paragraph" style:parent-style-name="Text_20_body">
      <style:text-properties officeooo:rsid="0014dda8" officeooo:paragraph-rsid="0014dda8"/>
    </style:style>
    <style:style style:name="P11" style:family="paragraph" style:parent-style-name="Text_20_body" style:master-page-name="Frontmatter">
      <style:paragraph-properties style:page-number="auto" fo:break-before="page"/>
      <style:text-properties officeooo:rsid="0017f519" officeooo:paragraph-rsid="0014dda8"/>
    </style:style>
    <style:style style:name="P12" style:family="paragraph" style:parent-style-name="Text_20_body" style:master-page-name="Frontmatter-numbered">
      <style:paragraph-properties style:page-number="auto" fo:break-before="page"/>
      <style:text-properties officeooo:rsid="0017f519" officeooo:paragraph-rsid="0017f519"/>
    </style:style>
    <style:style style:name="P13" style:family="paragraph" style:parent-style-name="Comment">
      <style:paragraph-properties fo:margin-left="0.0398in" fo:margin-right="0.0398in" fo:margin-top="0.039in" fo:margin-bottom="0in" style:line-height-at-least="0.0693in" fo:text-indent="0in" style:text-autospace="none" style:writing-mode="lr-tb"/>
    </style:style>
    <style:style style:name="P14" style:family="paragraph" style:parent-style-name="Text_20_body">
      <style:text-properties officeooo:rsid="0017f519" officeooo:paragraph-rsid="0017f519"/>
    </style:style>
    <style:style style:name="P15" style:family="paragraph" style:parent-style-name="Text_20_body">
      <style:text-properties officeooo:paragraph-rsid="0026bae4"/>
    </style:style>
    <style:style style:name="P16" style:family="paragraph" style:parent-style-name="Text_20_body">
      <style:text-properties officeooo:rsid="002874aa" officeooo:paragraph-rsid="0026bae4"/>
    </style:style>
    <style:style style:name="P17" style:family="paragraph" style:parent-style-name="Text_20_body" style:master-page-name="Frontmatter">
      <style:paragraph-properties style:page-number="auto" fo:break-before="page"/>
      <style:text-properties officeooo:rsid="0014dda8" officeooo:paragraph-rsid="0014dda8"/>
    </style:style>
    <style:style style:name="P18" style:family="paragraph" style:parent-style-name="Quote">
      <style:paragraph-properties fo:line-height="100%"/>
      <style:text-properties officeooo:paragraph-rsid="002874aa"/>
    </style:style>
    <style:style style:name="P19" style:family="paragraph" style:parent-style-name="Quote">
      <style:paragraph-properties fo:line-height="100%"/>
    </style:style>
    <style:style style:name="P20" style:family="paragraph" style:parent-style-name="Quote">
      <style:paragraph-properties fo:line-height="100%"/>
      <style:text-properties officeooo:paragraph-rsid="0025510a"/>
    </style:style>
    <style:style style:name="P21" style:family="paragraph" style:parent-style-name="Quote">
      <style:paragraph-properties fo:line-height="100%"/>
      <style:text-properties officeooo:paragraph-rsid="002c7ab7"/>
    </style:style>
    <style:style style:name="P22" style:family="paragraph" style:parent-style-name="Comment">
      <style:paragraph-properties fo:text-align="left" style:text-autospace="none"/>
    </style:style>
    <style:style style:name="P23" style:family="paragraph" style:parent-style-name="Comment">
      <style:paragraph-properties fo:margin-top="0in" fo:margin-bottom="0.0575in" fo:text-align="left" style:text-autospace="none"/>
    </style:style>
    <style:style style:name="P24" style:family="paragraph" style:parent-style-name="Comment">
      <style:paragraph-properties style:line-height-at-least="0.0693in" fo:break-before="page"/>
    </style:style>
    <style:style style:name="P25" style:family="paragraph" style:parent-style-name="Poetry_20_Title" style:master-page-name="Poetry">
      <style:paragraph-properties style:page-number="1" fo:break-before="page"/>
      <style:text-properties fo:font-size="16pt" officeooo:rsid="002c7ab7" officeooo:paragraph-rsid="002c7ab7" style:font-size-asian="16pt" style:font-size-complex="16pt"/>
    </style:style>
    <style:style style:name="P26" style:family="paragraph" style:parent-style-name="Text_20_body">
      <style:paragraph-properties fo:margin-top="0in" fo:margin-bottom="0.0575in" style:contextual-spacing="false"/>
      <style:text-properties officeooo:rsid="001ac331" officeooo:paragraph-rsid="001ac331"/>
    </style:style>
    <style:style style:name="P27" style:family="paragraph" style:parent-style-name="Poetry_20_Title">
      <style:paragraph-properties fo:break-before="page"/>
      <style:text-properties officeooo:paragraph-rsid="003139c2"/>
    </style:style>
    <style:style style:name="P28" style:family="paragraph" style:parent-style-name="Comment">
      <style:paragraph-properties fo:margin-left="0.0398in" fo:margin-right="0.0398in" fo:margin-top="0.039in" fo:margin-bottom="0in" style:line-height-at-least="0.0693in" fo:text-align="justify" fo:text-indent="0in" style:text-autospace="none" style:writing-mode="lr-tb"/>
    </style:style>
    <style:style style:name="P29" style:family="paragraph" style:parent-style-name="Comment">
      <style:paragraph-properties fo:margin-left="0.0398in" fo:margin-right="0.0398in" fo:margin-top="0.039in" fo:margin-bottom="0in" fo:line-height="100%" fo:text-align="justify" fo:text-indent="0in" style:text-autospace="ideograph-alpha" style:punctuation-wrap="hanging" style:line-break="strict" loext:tab-stop-distance="0in" style:writing-mode="lr-tb" style:writing-mode-automatic="false">
        <style:tab-stops/>
      </style:paragraph-properties>
      <style:text-properties fo:hyphenate="false" loext:hyphenation-no-caps="false" loext:hyphenation-no-last-word="false"/>
    </style:style>
    <style:style style:name="P30" style:family="paragraph" style:parent-style-name="Text_20_body">
      <style:paragraph-properties fo:margin-top="0in" fo:margin-bottom="0.0575in" style:contextual-spacing="false"/>
      <style:text-properties officeooo:rsid="001f49c2" officeooo:paragraph-rsid="001f49c2"/>
    </style:style>
    <style:style style:name="P31" style:family="paragraph" style:parent-style-name="Text_20_body">
      <style:paragraph-properties fo:margin-top="0in" fo:margin-bottom="0in" style:contextual-spacing="false"/>
      <style:text-properties officeooo:rsid="001f49c2" officeooo:paragraph-rsid="001f49c2"/>
    </style:style>
    <style:style style:name="P32" style:family="paragraph" style:parent-style-name="Text_20_body">
      <style:paragraph-properties fo:margin-top="0in" fo:margin-bottom="0in" style:contextual-spacing="false">
        <style:tab-stops>
          <style:tab-stop style:position="1.502in"/>
          <style:tab-stop style:position="2.3626in"/>
        </style:tab-stops>
      </style:paragraph-properties>
      <style:text-properties officeooo:rsid="001f49c2" officeooo:paragraph-rsid="001f49c2"/>
    </style:style>
    <style:style style:name="P33" style:family="paragraph" style:parent-style-name="Poetry_20_Title">
      <style:paragraph-properties fo:break-before="page"/>
    </style:style>
    <style:style style:name="P34" style:family="paragraph" style:parent-style-name="Text_20_body">
      <style:paragraph-properties fo:margin-top="0in" fo:margin-bottom="0in" style:contextual-spacing="false">
        <style:tab-stops>
          <style:tab-stop style:position="1.502in"/>
          <style:tab-stop style:position="2.3626in"/>
        </style:tab-stops>
      </style:paragraph-properties>
      <style:text-properties officeooo:rsid="003139c2" officeooo:paragraph-rsid="003139c2"/>
    </style:style>
    <style:style style:name="P35" style:family="paragraph" style:parent-style-name="Poetry_20_Title">
      <style:paragraph-properties fo:break-before="page"/>
      <style:text-properties officeooo:rsid="0037de52" officeooo:paragraph-rsid="0037de52"/>
    </style:style>
    <style:style style:name="P36" style:family="paragraph" style:parent-style-name="Text_20_body">
      <style:paragraph-properties fo:margin-top="0in" fo:margin-bottom="0in" style:contextual-spacing="false">
        <style:tab-stops>
          <style:tab-stop style:position="1.502in"/>
          <style:tab-stop style:position="2.3626in"/>
        </style:tab-stops>
      </style:paragraph-properties>
      <style:text-properties officeooo:rsid="0037de52" officeooo:paragraph-rsid="0037de52"/>
    </style:style>
    <style:style style:name="P37" style:family="paragraph" style:parent-style-name="Text_20_body">
      <style:paragraph-properties fo:margin-top="0in" fo:margin-bottom="0in" style:contextual-spacing="false">
        <style:tab-stops>
          <style:tab-stop style:position="1.502in"/>
          <style:tab-stop style:position="2.3626in"/>
        </style:tab-stops>
      </style:paragraph-properties>
      <style:text-properties officeooo:rsid="0025510a" officeooo:paragraph-rsid="0025510a"/>
    </style:style>
    <style:style style:name="T1" style:family="text">
      <style:text-properties officeooo:rsid="00197293"/>
    </style:style>
    <style:style style:name="T2" style:family="text">
      <style:text-properties officeooo:rsid="0017f519"/>
    </style:style>
    <style:style style:name="T3" style:family="text">
      <style:text-properties style:use-window-font-color="true" loext:opacity="0%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officeooo:rsid="0026bae4"/>
    </style:style>
    <style:style style:name="T5" style:family="text">
      <style:text-properties officeooo:rsid="002874aa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90dea" style:font-style-asian="normal" style:font-style-complex="normal"/>
    </style:style>
    <style:style style:name="T8" style:family="text">
      <style:text-properties fo:color="#000000" loext:opacity="100%" style:font-name="Times New Roman" fo:font-size="12pt" fo:letter-spacing="normal" fo:font-style="normal" fo:font-weight="normal" style:font-style-asian="normal" style:font-style-complex="normal" loext:padding="0in" loext:border="none"/>
    </style:style>
    <style:style style:name="T9" style:family="text">
      <style:text-properties fo:color="#000000" loext:opacity="100%" style:font-name="Times New Roman" fo:font-size="12pt" fo:letter-spacing="normal" fo:font-style="normal" fo:font-weight="normal" officeooo:rsid="0025510a" style:font-style-asian="normal" style:font-style-complex="normal" loext:padding="0in" loext:border="none"/>
    </style:style>
    <style:style style:name="T10" style:family="text">
      <style:text-properties fo:color="#000000" loext:opacity="100%" style:font-name="Times New Roman" fo:font-size="12pt" fo:letter-spacing="normal" fo:font-style="italic" fo:font-weight="normal" officeooo:rsid="0030af39" style:font-style-asian="italic" style:font-style-complex="italic" loext:padding="0in" loext:border="none"/>
    </style:style>
    <style:style style:name="T11" style:family="text">
      <style:text-properties officeooo:rsid="002c7ab7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color="#000000" loext:opacity="100%" style:font-name="Times New Roman" fo:font-size="12pt" fo:letter-spacing="normal" fo:font-style="normal" fo:font-weight="normal" officeooo:rsid="002c7ab7" style:font-style-asian="normal" style:font-style-complex="normal" loext:padding="0in" loext:border="none"/>
    </style:style>
    <style:style style:name="T14" style:family="text">
      <style:text-properties fo:font-style="normal" fo:font-weight="normal" style:font-style-asian="normal" style:font-weight-asian="normal"/>
    </style:style>
    <style:style style:name="T15" style:family="text">
      <style:text-properties officeooo:rsid="001f49c2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ngti SC" style:font-size-asian="10pt" style:language-asian="zh" style:country-asian="CN" style:font-style-asian="normal" style:font-weight-asian="normal" style:font-name-complex="Arial Unicode MS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officeooo:rsid="00218c29"/>
    </style:style>
    <style:style style:name="T18" style:family="text">
      <style:text-properties officeooo:rsid="00216246"/>
    </style:style>
    <style:style style:name="T19" style:family="text">
      <style:text-properties officeooo:rsid="001fea34"/>
    </style:style>
    <style:style style:name="T20" style:family="text">
      <style:text-properties fo:font-size="11pt" style:font-size-asian="11pt" style:font-size-complex="11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­</text:span><office:annotation office:name="__Annotation__511_3572362212" loext:resolved="false"><dc:creator>Vladimir Herdman</dc:creator><dc:date>2026-05-15T20:49:22.083476000</dc:date><meta:creator-initials>VTH</meta:creator-initials><text:p text:style-name="Comment">Current idea is to make it like a love letter/goodbye letter/collection of poems/like a last date.</text:p><text:p text:style-name="Comment"/></office:annotation>GOODBYE OLLIE<text:span text:style-name="T1">­</text:span><office:annotation-end office:name="__Annotation__511_3572362212"/></text:p>
      <text:p text:style-name="P2"/>
      <text:p text:style-name="P2"/>
      <text:p text:style-name="P3"/>
      <text:p text:style-name="P3"/>
      <text:p text:style-name="P4"/>
      <text:p text:style-name="P4"/>
      <text:p text:style-name="P5">GOODBYE OLLIE</text:p>
      <text:p text:style-name="P3"/>
      <text:p text:style-name="P3"/>
      <text:p text:style-name="P3"/>
      <text:p text:style-name="P3"/>
      <text:p text:style-name="P6">Vladimir Tomasovitch Herdman</text:p>
      <text:p text:style-name="P7"/>
      <text:p text:style-name="P7"><text:span text:style-name="T2">Table of </text:span>Contents</text:p>
      <text:p text:style-name="P8"/>
      <text:table-of-content text:style-name="Sect1" text:name="Table of Contents1">
        <text:table-of-content-source text:outline-level="10" text:use-outline-level="false" text:use-index-marks="false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Poetry_20_Title"/>
          </text:index-source-styles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9"><text:a xlink:type="simple" xlink:href="#__RefHeading___Toc155_3645116443" office:name="poetry title" text:style-name="Index_20_Link" text:visited-style-name="Index_20_Link">poetry title<text:tab/>1</text:a></text:p>
        </text:index-body>
      </text:table-of-content>
      <text:p text:style-name="P10"/>
      <text:p text:style-name="P11"/>
      <text:p text:style-name="P12"><office:annotation office:name="__Annotation__437_3516834471" loext:resolved="false"><dc:creator>Vladimir Herdman</dc:creator><dc:date>2026-05-09T23:05:56.863771000</dc:date><meta:creator-initials>VTH</meta:creator-initials><text:p text:style-name="P13"><text:span text:style-name="T3">It’s pretty bad make it better. You’re emo too much lately do better man.</text:span></text:p><text:p text:style-name="P13"><text:span text:style-name="T3"/></text:p></office:annotation>Preface<office:annotation-end office:name="__Annotation__437_3516834471"/></text:p>
      <text:p text:style-name="P14"/>
      <text:p text:style-name="P15"><text:span text:style-name="T4">There’s something wrong with wanting to be an individual. I’ve come to this conclusion through careful living and extended time around people who laugh when I do, but don’t share the same interests as </text:span><office:annotation office:name="__Annotation__416_2779579312" loext:resolved="false"><dc:creator>Vladimir Herdman</dc:creator><dc:date>2026-05-09T23:31:15.483613000</dc:date><meta:creator-initials>VTH</meta:creator-initials><text:p text:style-name="Comment">I’m only really comfortable around friends and myself. I’m sorry for the clowning, I’m sorry for how I act, I’m sorry I’m sorry.</text:p><text:p text:style-name="Comment"/></office:annotation><text:span text:style-name="T4">me. I’v</text:span><text:span text:style-name="T5">e realized</text:span><office:annotation-end office:name="__Annotation__416_2779579312"/><text:span text:style-name="T5"> how I act is an issue, and that my friends are all I’m comfortable around.</text:span></text:p>
      <text:p text:style-name="P16"/>
      <text:p text:style-name="P17"/>
      <text:p text:style-name="P7"/>
      <text:p text:style-name="Text_20_body"/>
      <text:p text:style-name="Text_20_body"/>
      <text:p text:style-name="Text_20_body"/>
      <text:p text:style-name="Text_20_body"/>
      <text:p text:style-name="Text_20_body"/>
      <text:p text:style-name="P18">I aint ever felt better and</text:p>
      <text:p text:style-name="P18">I aint ever been dumbe<text:span text:style-name="T1">r.</text:span></text:p>
      <text:p text:style-name="P19"><text:span text:style-name="T6">—</text:span><text:span text:style-name="T7">Jesse Welles</text:span></text:p>
      <text:p text:style-name="P19"/>
      <text:p text:style-name="P20"><text:span text:style-name="Emphasis">I can’t even guess myself what it must be</text:span></text:p>
      <text:p text:style-name="P20"><text:span text:style-name="Emphasis">to live the life of a human being.</text:span></text:p>
      <text:p text:style-name="P19"><text:span text:style-name="Emphasis"><text:span text:style-name="T8">—</text:span></text:span><text:span text:style-name="Emphasis"><text:span text:style-name="T9">Osamu Dazai, </text:span></text:span><text:span text:style-name="Emphasis"><text:span text:style-name="T10">No Longer Human</text:span></text:span></text:p>
      <text:p text:style-name="P19"><text:span text:style-name="Emphasis"><text:span text:style-name="T9"/></text:span></text:p>
      <text:p text:style-name="P21"><text:span text:style-name="Emphasis"><text:span text:style-name="T11">I </text:span></text:span><office:annotation office:name="__Annotation__415_2779579312" loext:resolved="false"><dc:creator>Vladimir Herdman</dc:creator><dc:date>2026-05-09T23:30:11.814733000</dc:date><meta:creator-initials>VTH</meta:creator-initials><text:p text:style-name="P22"><text:span text:style-name="T12">I don’t want to be normal,</text:span></text:p><text:p text:style-name="P22"><text:span text:style-name="T12">I want to be me.</text:span></text:p><text:p text:style-name="P23"><text:span text:style-name="T12">Isn’t that enough?</text:span></text:p><text:p text:style-name="P23"><text:span text:style-name="T12"/></text:p></office:annotation><text:span text:style-name="Emphasis"><text:span text:style-name="T11">don’t want to be normal</text:span></text:span><office:annotation-end office:name="__Annotation__415_2779579312"/><text:span text:style-name="Emphasis"><text:span text:style-name="T11">,</text:span></text:span></text:p>
      <text:p text:style-name="P21"><text:span text:style-name="Emphasis"><text:span text:style-name="T11">I want to be me</text:span></text:span><text:span text:style-name="Emphasis">.</text:span></text:p>
      <text:p text:style-name="P21"><text:span text:style-name="Emphasis"><text:span text:style-name="T9">—</text:span></text:span><text:span text:style-name="Emphasis"><text:span text:style-name="T13">My Brain</text:span></text:span></text:p>
      <text:p text:style-name="P24" loext:marker-style-name="T14"><text:span text:style-name="T14"/></text:p>
      <text:p text:style-name="Text_20_body"/>
      <text:p text:style-name="P25"><text:bookmark-start text:name="__RefHeading___Toc155_3645116443"/><office:annotation office:name="__Annotation__441_2779579312" loext:resolved="false"><dc:creator>Vladimir Herdman</dc:creator><dc:date>2026-05-09T23:32:14.079003000</dc:date><meta:creator-initials>VTH</meta:creator-initials><text:p text:style-name="Comment">I’m thinking overly positive from here, to goofy/weird, to whatever I want towards the end of the book here.</text:p><text:p text:style-name="Comment"/></office:annotation>Hello Ollie<office:annotation-end office:name="__Annotation__441_2779579312"/>,<text:bookmark-end text:name="__RefHeading___Toc155_3645116443"/></text:p>
      <text:p text:style-name="Text_20_body"/>
      <text:p text:style-name="P26">word<text:span text:style-name="T15">s</text:span></text:p>
      <text:p text:style-name="P27"><office:annotation office:name="__Annotation__434_3516834471" loext:resolved="false"><dc:creator>Vladimir Herdman</dc:creator><dc:date>2026-05-09T23:02:11.382157000</dc:date><meta:creator-initials>VTH</meta:creator-initials><text:p text:style-name="P28"><text:span text:style-name="T16">Base off an actual photo of paint splatter or something, people are getting tree/person, and not the intended splatter text effect.</text:span></text:p><text:p text:style-name="P29"><text:span text:style-name="T16"/></text:p></office:annotation>What Have I Done<office:annotation-end office:name="__Annotation__434_3516834471"/></text:p>
      <text:p text:style-name="P30"/>
      <text:p text:style-name="P31"><text:s text:c="4"/><text:span text:style-name="T17">to o</text:span> <text:s text:c="72"/><text:span text:style-name="T18">m</text:span></text:p>
      <text:p text:style-name="P31"><text:span text:style-name="T17">fa t</text:span> <text:s text:c="5"/><text:span text:style-name="T17">a</text:span> <text:s text:c="66"/><text:span text:style-name="T18">y</text:span></text:p>
      <text:p text:style-name="P31"><text:s text:c="2"/><text:span text:style-name="T17">l</text:span> <text:s text:c="69"/><text:span text:style-name="T18">he <text:s text:c="9"/>l</text:span></text:p>
      <text:p text:style-name="P31"><text:s text:c="4"/><text:span text:style-name="T17">o</text:span> <text:s text:c="71"/><text:span text:style-name="T18">a <text:s text:c="9"/>a</text:span></text:p>
      <text:p text:style-name="P31"><text:s text:c="2"/><text:span text:style-name="T17">a</text:span> <text:s text:c="70"/><text:span text:style-name="T18">r <text:s text:c="11"/>s</text:span></text:p>
      <text:p text:style-name="P31"><text:s text:c="5"/><text:span text:style-name="T17">d</text:span> <text:s text:c="66"/><text:span text:style-name="T18">t <text:s text:c="15"/>t</text:span></text:p>
      <text:p text:style-name="P31"><text:s text:c="56"/><text:span text:style-name="T18">y <text:s/>go <text:s text:c="28"/></text:span><text:span text:style-name="T17">c</text:span></text:p>
      <text:p text:style-name="P31"><text:s text:c="21"/><text:span text:style-name="T18">I</text:span> <text:s text:c="24"/><text:span text:style-name="T18">h <text:s/>m <text:s text:c="10"/>d <text:s text:c="26"/>h</text:span></text:p>
      <text:p text:style-name="P31"><text:s text:c="14"/><text:span text:style-name="T18">e</text:span> <text:s text:c="8"/><text:span text:style-name="T18">od</text:span> <text:s/><text:span text:style-name="T18">t</text:span> <text:s text:c="12"/><text:span text:style-name="T18">o <text:s text:c="43"/>a hn</text:span></text:p>
      <text:p text:style-name="P31"><text:s text:c="12"/><text:span text:style-name="T18">ev</text:span> <text:s text:c="17"/><text:span text:style-name="T18">ah</text:span> <text:s text:c="33"/><text:span text:style-name="T18">I <text:s text:c="20"/>c <text:s/>e</text:span></text:p>
      <text:p text:style-name="P31"><text:s text:c="9"/><text:span text:style-name="T18">n</text:span> <text:s text:c="24"/><text:span text:style-name="T18">w</text:span> <text:s text:c="33"/><text:span text:style-name="T18">ca</text:span></text:p>
      <text:p text:style-name="P32"><text:s text:c="5"/><text:span text:style-name="T18">sa</text:span> <text:s text:c="32"/>w <text:s text:c="29"/><text:span text:style-name="T18">n</text:span></text:p>
      <text:p text:style-name="P32"><text:s text:c="9"/><text:span text:style-name="T18">y</text:span> <text:s text:c="29"/>e <text:s text:c="37"/><text:span text:style-name="T18">t</text:span></text:p>
      <text:p text:style-name="P32"><text:s text:c="40"/></text:p>
      <text:p text:style-name="P32"><text:s text:c="41"/>t <text:s text:c="34"/><text:span text:style-name="T18">fe</text:span></text:p>
      <text:p text:style-name="P32"><text:s text:c="43"/>a <text:s text:c="35"/><text:span text:style-name="T18">el m</text:span></text:p>
      <text:p text:style-name="P32"><text:s text:c="45"/>n <text:s text:c="36"/><text:span text:style-name="T18">y l</text:span></text:p>
      <text:p text:style-name="P32"><text:s text:c="44"/>d <text:s text:c="38"/><text:span text:style-name="T18">e</text:span></text:p>
      <text:p text:style-name="P32"><text:s text:c="45"/>d <text:s text:c="37"/><text:span text:style-name="T18">g</text:span></text:p>
      <text:p text:style-name="P32"><text:s text:c="44"/>r</text:p>
      <text:p text:style-name="P32"><text:s text:c="45"/>i</text:p>
      <text:p text:style-name="P32"><text:s text:c="46"/>pi n</text:p>
      <text:p text:style-name="P32"><text:s text:c="50"/>g d o</text:p>
      <text:p text:style-name="P32"><text:s text:c="41"/><text:span text:style-name="T18">o</text:span> <text:s text:c="11"/>w</text:p>
      <text:p text:style-name="P32"><text:s text:c="37"/><text:span text:style-name="T18">n</text:span> <text:s text:c="16"/>n th e</text:p>
      <text:p text:style-name="P32"><text:s text:c="29"/><text:span text:style-name="T18">to</text:span> <text:s text:c="29"/>p</text:p>
      <text:p text:style-name="P32"><text:s text:c="23"/><text:span text:style-name="T18">th</text:span> <text:s text:c="34"/>a <text:s/>g</text:p>
      <text:p text:style-name="P32"><text:s text:c="22"/><text:span text:style-name="T18">e</text:span> <text:s text:c="35"/>e <text:s text:c="7"/><text:span text:style-name="T19">a <text:s text:c="4"/>t <text:s text:c="5"/>s e <text:s text:c="2"/>e</text:span></text:p>
      <text:p text:style-name="P32"><text:s text:c="16"/><text:span text:style-name="T18">flo <text:s/>or</text:span> <text:s text:c="26"/><text:span text:style-name="T19">f or <text:s text:c="7"/>l <text:s text:c="2"/>l <text:s text:c="4"/>o <text:s text:c="5"/>m y <text:s text:c="2"/>sh a <text:s/>me</text:span></text:p>
      <text:p text:style-name="P33">Be Normal</text:p>
      <text:p text:style-name="P34"/>
      <text:p text:style-name="P34">I don’t want to be normal,</text:p>
      <text:p text:style-name="P34">I want to be me.</text:p>
      <text:p text:style-name="P34"/>
      <text:p text:style-name="P34">Isn’t that enough?</text:p>
      <text:p text:style-name="P35">Ollie Ollie Ollie Ollie Ollie Ollie Ollie Ollie</text:p>
      <text:p text:style-name="P36">Ollie Ollie Ollie Ollie Ollie Ollie Ollie Ollie Ollie Ollie Ollie Ollie</text:p>
      <text:p text:style-name="P36">Ollie Ollie Ollie Ollie Ollie Ollie Ollie Ollie Ollie Ollie Ollie Ollie</text:p>
      <text:p text:style-name="P36">Ollie Ollie Ollie Ollie Ollie Ollie Ollie Ollie Ollie Ollie Ollie Ollie</text:p>
      <text:p text:style-name="P36">Ollie Ollie Ollie Ollie Ollie Ollie Ollie Ollie Ollie Ollie Ollie Ollie</text:p>
      <text:p text:style-name="P36">Ollie Ollie Ollie Ollie Ollie Ollie Ollie Ollie Ollie Ollie Ollie Ollie</text:p>
      <text:p text:style-name="P36">Ollie Ollie Ollie Ollie Ollie Ollie Ollie Ollie Ollie Ollie Ollie Ollie</text:p>
      <text:p text:style-name="P36">Ollie Ollie Ollie Ollie Ollie Ollie Ollie Ollie Ollie Ollie Ollie Ollie</text:p>
      <text:p text:style-name="P36">Ollie Ollie Ollie Ollie Ollie Ollie Ollie Ollie Ollie Ollie Ollie Ollie</text:p>
      <text:p text:style-name="P36">Ollie Ollie Ollie Ollie Ollie Ollie Ollie Ollie Ollie Ollie Ollie Ollie</text:p>
      <text:p text:style-name="P36">Ollie Ollie Ollie Ollie Ollie Ollie Ollie Ollie Ollie Ollie Ollie Ollie</text:p>
      <text:p text:style-name="P36">Ollie Ollie Ollie Ollie Ollie Ollie Ollie Ollie Ollie Ollie Ollie Ollie</text:p>
      <text:p text:style-name="P36">Ollie Ollie Ollie Ollie Ollie Ollie Ollie Ollie Ollie Ollie Ollie Ollie</text:p>
      <text:p text:style-name="P36">Ollie Ollie Ollie Ollie Ollie Ollie Ollie Ollie Ollie Ollie Ollie Ollie</text:p>
      <text:p text:style-name="P36">Ollie Ollie Ollie Ollie Ollie Vova<text:span text:style-name="T20"> </text:span>Ollie Ollie Ollie Ollie Ollie Ollie</text:p>
      <text:p text:style-name="P36">Ollie Ollie Ollie Ollie Ollie Ollie Ollie Ollie Ollie Ollie Ollie Ollie</text:p>
      <text:p text:style-name="P36">Ollie Ollie Ollie Ollie Ollie Ollie Ollie Ollie Ollie Ollie Ollie Ollie</text:p>
      <text:p text:style-name="P36">Ollie Ollie Ollie Ollie Ollie Ollie Ollie Ollie Ollie Ollie Ollie Ollie</text:p>
      <text:p text:style-name="P36">Ollie Ollie Ollie Ollie Ollie Ollie Ollie Ollie Ollie Ollie Ollie Ollie</text:p>
      <text:p text:style-name="P36">Ollie Ollie Ollie Ollie Ollie Ollie Ollie Ollie Ollie Ollie Ollie Ollie</text:p>
      <text:p text:style-name="P36">Ollie Ollie Ollie Ollie Ollie Ollie Ollie Ollie Ollie Ollie Ollie Ollie</text:p>
      <text:p text:style-name="P36">Ollie Ollie Ollie Ollie Ollie Ollie Ollie Ollie Ollie Ollie Ollie Ollie</text:p>
      <text:p text:style-name="P36">Ollie Ollie Ollie Ollie Ollie Ollie Ollie Ollie Ollie Ollie Ollie Ollie</text:p>
      <text:p text:style-name="P36">Ollie Ollie Ollie Ollie Ollie Ollie Ollie Ollie Ollie Ollie Ollie Ollie</text:p>
      <text:p text:style-name="P36">Ollie Ollie Ollie Ollie Ollie Ollie Ollie Ollie Ollie Ollie Ollie Ollie</text:p>
      <text:p text:style-name="P36">Ollie Ollie Ollie Ollie Ollie Ollie Ollie Ollie Ollie Ollie Ollie Ollie</text:p>
      <text:p text:style-name="P36">Ollie Ollie Ollie Ollie Ollie Ollie Ollie Ollie Ollie Ollie Ollie Ollie</text:p>
      <text:p text:style-name="P36">Ollie Ollie Ollie Ollie Ollie Ollie Ollie Ollie Ollie Ollie Ollie Ollie</text:p>
      <text:p text:style-name="P36">Ollie Ollie Ollie Ollie Ollie Ollie Ollie Ollie Ollie Ollie Ollie Ollie</text:p>
      <text:p text:style-name="P36">Ollie Ollie Ollie Ollie Ollie Ollie Ollie Ollie Ollie Ollie Ollie Ollie</text:p>
      <text:p text:style-name="P36">Ollie Ollie Ollie Ollie Ollie Ollie Ollie Ollie Ollie Ollie Ollie Ollie</text:p>
      <text:p text:style-name="P33">Goodbye Ollie,</text:p>
      <text:p text:style-name="P37"/>
      <text:p text:style-name="P37">I feel utterly and irrefutably incapable of expressing myself fully within the bounds of the language I have grown up with. One of my greatest fears is that I am a wholly uni-faceted individual with no complex emotions and extreme predictability in my actions.</text:p>
      <text:p text:style-name="P37"/>
      <text:p text:style-name="P37">Maybe I’m not all that afraid of being unable to express myself, but that there’s nothing to express. I’m afraid of being nothing, that I have no dramatic knots in my living cords.</text:p>
      <text:p text:style-name="P37"/>
      <text:p text:style-name="P37">I’m sorry for making any of this. It was a waste of time, and I’ve only made myself sadder. I will one day be my undoing. Everything I say is a lie, and just a way to convince myself there’s something more to who I am. Forgive my reachings and idiosyncrasies for what they are, a lack of character and a desire for what I don’t have.</text:p>
      <text:p text:style-name="P37"/>
      <text:p text:style-name="P37">Sincerely,</text:p>
      <text:p text:style-name="P37">Vov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Times New Roman" fo:font-family="'Times New Roman'" style:font-family-generic="roman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575in" style:contextual-spacing="false" fo:line-height="115%"/>
      <style:text-properties officeooo:rsid="001ca094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Comment" style:family="paragraph" style:parent-style-name="Standard" style:class="extra">
      <style:paragraph-properties fo:margin-left="0.0398in" fo:margin-right="0.0398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Quote" style:family="paragraph" style:parent-style-name="Text_20_body">
      <style:paragraph-properties fo:text-align="right" style:justify-single-word="false"/>
      <style:text-properties fo:font-style="italic" style:font-style-asian="italic" style:font-style-complex="italic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oetry_20_Title" style:display-name="Poetry Title" style:family="paragraph" style:parent-style-name="Text_20_body">
      <style:paragraph-properties fo:margin-top="0in" fo:margin-bottom="0in" style:contextual-spacing="false"/>
      <style:text-properties fo:font-size="16pt" fo:font-weight="bold" officeooo:rsid="0014dda8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4.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right" style:justify-single-word="false"/>
    </style:style>
    <style:style style:name="MP2" style:family="paragraph" style:parent-style-name="Header_20_left">
      <style:paragraph-properties fo:text-align="left" style:justify-single-word="false"/>
    </style:style>
    <style:page-layout style:name="Mpm1" style:page-usage="mirrored">
      <style:page-layout-properties fo:page-width="5.5in" fo:page-height="8.5in" style:num-format="1" style:print-orientation="portrait" fo:margin-top="0.5in" fo:margin-bottom="0.5in" fo:margin-left="0.5in" fo:margin-right="0.5in" fo:border="none" fo:padding="0.020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page-layout style:name="Mpm2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5.5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mirrored">
      <style:page-layout-properties fo:page-width="5.5in" fo:page-height="8.5in" style:num-format="I" style:print-orientation="portrait" fo:margin-top="0.5in" fo:margin-bottom="0.5in" fo:margin-left="0.5in" fo:margin-right="0.5in" fo:border="none" fo:padding="0.020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page-layout style:name="Mpm9">
      <style:page-layout-properties fo:page-width="5.5in" fo:page-height="8.5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left>
        <text:p text:style-name="Header_20_left"/>
      </style:header-lef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dnote" loext:hidden="true" style:hidden="true" style:page-layout-name="Mpm5" draw:style-name="Mdp1"/>
    <style:master-page style:name="Envelope" loext:hidden="true" style:hidden="true" style:page-layout-name="Mpm6" draw:style-name="Mdp1"/>
    <style:master-page style:name="Index" loext:hidden="true" style:hidden="true" style:page-layout-name="Mpm2" draw:style-name="Mdp1"/>
    <style:master-page style:name="Landscape" loext:hidden="true" style:hidden="true" style:page-layout-name="Mpm7" draw:style-name="Mdp1"/>
    <style:master-page style:name="Frontmatter" style:page-layout-name="Mpm8" draw:style-name="Mdp1">
      <style:header>
        <text:p text:style-name="MP1"><text:bookmark text:name="PageNumWizard_HEADER_Frontmatter-numbered5 Copy 5"/></text:p>
      </style:header>
      <style:header-left>
        <text:p text:style-name="MP2"><text:bookmark text:name="PageNumWizard_HEADER_Frontmatter-numbered5 Copy 5 Copy 16"/><text:bookmark text:name="PageNumWizard_HEADER_Frontmatter-numbered5 Copy 5 Copy 14"/><text:bookmark text:name="PageNumWizard_HEADER_Frontmatter-numbered5 Copy 5 Copy 12"/><text:bookmark text:name="PageNumWizard_HEADER_Frontmatter-numbered5 Copy 5 Copy 10"/><text:bookmark text:name="PageNumWizard_HEADER_Frontmatter-numbered5 Copy 5 Copy 8"/><text:bookmark text:name="PageNumWizard_HEADER_Frontmatter-numbered5 Copy 5 Copy 6"/><text:bookmark text:name="PageNumWizard_HEADER_Frontmatter-numbered5 Copy 5 Copy 4"/><text:bookmark text:name="PageNumWizard_HEADER_Frontmatter-numbered5 Copy 5 Copy 2"/><text:bookmark text:name="PageNumWizard_HEADER_Frontmatter-numbered6 Copy 5"/><text:bookmark text:name="PageNumWizard_HEADER_Frontmatter-numbered5 Copy 5 Copy 1"/><text:bookmark text:name="PageNumWizard_HEADER_Frontmatter-numbered5 Copy 5 Copy 3"/><text:bookmark text:name="PageNumWizard_HEADER_Frontmatter-numbered5 Copy 5 Copy 5"/><text:bookmark text:name="PageNumWizard_HEADER_Frontmatter-numbered5 Copy 5 Copy 7"/><text:bookmark text:name="PageNumWizard_HEADER_Frontmatter-numbered5 Copy 5 Copy 9"/><text:bookmark text:name="PageNumWizard_HEADER_Frontmatter-numbered5 Copy 5 Copy 11"/><text:bookmark text:name="PageNumWizard_HEADER_Frontmatter-numbered5 Copy 5 Copy 13"/><text:bookmark text:name="PageNumWizard_HEADER_Frontmatter-numbered5 Copy 5 Copy 15"/></text:p>
      </style:header-left>
    </style:master-page>
    <style:master-page style:name="HTML" style:page-layout-name="Mpm9" draw:style-name="Mdp1"/>
    <style:master-page style:name="Footnote" style:page-layout-name="Mpm5" draw:style-name="Mdp1"/>
    <style:master-page style:name="Frontmatter-numbered" style:page-layout-name="Mpm8" draw:style-name="Mdp1">
      <style:header>
        <text:p text:style-name="MP1"><text:bookmark-start text:name="PageNumWizard_HEADER_Frontmatter-numbered5"/><text:page-number text:select-page="current">VII</text:page-number><text:bookmark-end text:name="PageNumWizard_HEADER_Frontmatter-numbered5"/></text:p>
      </style:header>
      <style:header-left>
        <text:p text:style-name="MP2"><text:bookmark-start text:name="PageNumWizard_HEADER_Frontmatter-numbered6"/><text:page-number text:select-page="current">0</text:page-number><text:bookmark-end text:name="PageNumWizard_HEADER_Frontmatter-numbered6"/></text:p>
      </style:header-left>
    </style:master-page>
    <style:master-page style:name="Poetry" style:page-layout-name="Mpm1" draw:style-name="Mdp1">
      <style:header>
        <text:p text:style-name="MP1"><text:bookmark-start text:name="PageNumWizard_HEADER_Poetry11"/><text:page-number text:select-page="current">5</text:page-number><text:bookmark-end text:name="PageNumWizard_HEADER_Poetry11"/></text:p>
      </style:header>
      <style:header-left>
        <text:p text:style-name="MP2"><text:bookmark-start text:name="PageNumWizard_HEADER_Poetry10"/><text:page-number text:select-page="current">4</text:page-number><text:bookmark-end text:name="PageNumWizard_HEADER_Poetry10"/></text:p>
      </style:head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6T22:18:00.969720000</meta:creation-date>
    <dc:date>2026-05-20T21:45:14.998424000</dc:date>
    <meta:editing-duration>PT1H27M27S</meta:editing-duration>
    <meta:editing-cycles>29</meta:editing-cycles>
    <meta:generator>LibreOffice/26.2.3.2$MacOSX_AARCH64 LibreOffice_project/70e089b17412e4cb7773e41413306b17a2328c34</meta:generator>
    <dc:creator>Vladimir Herdman</dc:creator>
    <meta:document-statistic meta:table-count="0" meta:image-count="0" meta:object-count="0" meta:page-count="15" meta:paragraph-count="94" meta:word-count="758" meta:character-count="5892" meta:non-whitespace-character-count="3231"/>
  </office:meta>
</office:document-meta>
</file>