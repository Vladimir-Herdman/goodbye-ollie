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Text_20_body">
      <style:text-properties officeooo:rsid="0017f519" officeooo:paragraph-rsid="0017f519"/>
    </style:style>
    <style:style style:name="P14" style:family="paragraph" style:parent-style-name="Text_20_body">
      <style:text-properties officeooo:rsid="003cfd76" officeooo:paragraph-rsid="003cfd76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3d6ea7" officeooo:paragraph-rsid="003d6ea7"/>
    </style:style>
    <style:style style:name="P17" style:family="paragraph" style:parent-style-name="Text_20_body">
      <style:text-properties officeooo:paragraph-rsid="003d6ea7"/>
    </style:style>
    <style:style style:name="P18" style:family="paragraph" style:parent-style-name="Text_20_body">
      <style:text-properties officeooo:paragraph-rsid="003eb0bf"/>
    </style:style>
    <style:style style:name="P19" style:family="paragraph" style:parent-style-name="Text_20_body">
      <style:text-properties officeooo:rsid="003eb0bf" officeooo:paragraph-rsid="003eb0bf"/>
    </style:style>
    <style:style style:name="P20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1" style:family="paragraph" style:parent-style-name="Quote">
      <style:paragraph-properties fo:line-height="100%"/>
      <style:text-properties officeooo:paragraph-rsid="002874aa"/>
    </style:style>
    <style:style style:name="P22" style:family="paragraph" style:parent-style-name="Quote">
      <style:paragraph-properties fo:line-height="100%"/>
    </style:style>
    <style:style style:name="P23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4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5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6" style:family="paragraph" style:parent-style-name="Quote">
      <style:paragraph-properties fo:line-height="100%"/>
      <style:text-properties officeooo:paragraph-rsid="0025510a"/>
    </style:style>
    <style:style style:name="P27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8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29" style:family="paragraph" style:parent-style-name="Quote">
      <style:paragraph-properties fo:line-height="100%"/>
      <style:text-properties officeooo:paragraph-rsid="002c7ab7"/>
    </style:style>
    <style:style style:name="P30" style:family="paragraph" style:parent-style-name="Comment">
      <style:paragraph-properties style:line-height-at-least="0.0693in" fo:break-before="page"/>
    </style:style>
    <style:style style:name="P31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2" style:family="paragraph" style:parent-style-name="Poetry_20_Text">
      <style:text-properties officeooo:rsid="0038eaff" officeooo:paragraph-rsid="0038eaff"/>
    </style:style>
    <style:style style:name="P33" style:family="paragraph" style:parent-style-name="Poetry_20_Title">
      <style:paragraph-properties fo:break-before="page"/>
      <style:text-properties officeooo:paragraph-rsid="003139c2"/>
    </style:style>
    <style:style style:name="P34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35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6" style:family="paragraph" style:parent-style-name="Poetry_20_Title">
      <style:paragraph-properties fo:break-before="page"/>
    </style:style>
    <style:style style:name="P37" style:family="paragraph" style:parent-style-name="Poetry_20_Text">
      <style:text-properties officeooo:rsid="004069c6" officeooo:paragraph-rsid="004069c6"/>
    </style:style>
    <style:style style:name="P38" style:family="paragraph" style:parent-style-name="Poetry_20_Title">
      <style:paragraph-properties fo:break-before="page"/>
      <style:text-properties officeooo:rsid="0037de52" officeooo:paragraph-rsid="0037de52"/>
    </style:style>
    <style:style style:name="P39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officeooo:rsid="003d6ea7"/>
    </style:style>
    <style:style style:name="T4" style:family="text">
      <style:text-properties fo:font-style="normal" officeooo:rsid="003cfd76" style:font-style-asian="normal" style:font-style-complex="normal"/>
    </style:style>
    <style:style style:name="T5" style:family="text">
      <style:text-properties fo:font-style="normal" officeooo:rsid="003d6ea7" style:font-style-asian="normal" style:font-style-complex="normal"/>
    </style:style>
    <style:style style:name="T6" style:family="text">
      <style:text-properties officeooo:rsid="003eb0bf"/>
    </style:style>
    <style:style style:name="T7" style:family="text">
      <style:text-properties officeooo:rsid="0026bae4"/>
    </style:style>
    <style:style style:name="T8" style:family="text">
      <style:text-properties officeooo:rsid="003cfd76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dea" style:font-style-asian="normal" style:font-style-complex="normal"/>
    </style:style>
    <style:style style:name="T11" style:family="text">
      <style:text-properties officeooo:rsid="003adb42"/>
    </style:style>
    <style:style style:name="T12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5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6" style:family="text">
      <style:text-properties officeooo:rsid="002c7ab7"/>
    </style:style>
    <style:style style:name="T17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officeooo:rsid="00218c29"/>
    </style:style>
    <style:style style:name="T21" style:family="text">
      <style:text-properties officeooo:rsid="00216246"/>
    </style:style>
    <style:style style:name="T22" style:family="text">
      <style:text-properties officeooo:rsid="001fea34"/>
    </style:style>
    <style:style style:name="T23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text:p text:style-name="Comment">For the cover page, make it like “Goodbye Ollie” and then below it “A collection of Maybe-Poems by Vladimir Tomasovitch Herdman”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<office:annotation office:name="__Annotation__701_3423584298" loext:resolved="false"><dc:creator>Vladimir Herdman</dc:creator><dc:date>2026-06-01T23:03:00.084500000</dc:date><meta:creator-initials>VTH</meta:creator-initials><text:p text:style-name="Comment">Find out where the “for …” page goes to, and put “for ollie” or something.</text:p></office:annotation>GOODBYE OLLIE<office:annotation-end office:name="__Annotation__701_3423584298"/>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Preface</text:p>
      <text:p text:style-name="P13"/>
      <text:p text:style-name="P14"><text:span text:style-name="T3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4">—</text:span><text:span text:style-name="T5">Kurt Vonnegut, Jr., </text:span><text:span text:style-name="T3">Cat’s Cradle</text:span></text:p>
      <text:p text:style-name="P15"/>
      <text:p text:style-name="P16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6"/>
      <text:p text:style-name="P16">Otherwise, all writing was formed with a single thought in mind: “How do I make Ollie a little uncomfortable here, but still willing to laugh about it?” If I hit the mark, you’ll know.</text:p>
      <text:p text:style-name="P17"/>
      <text:p text:style-name="P18"><text:span text:style-name="T3">As a final </text:span><text:span text:style-name="T6">note on why I did this</text:span><text:span text:style-name="T3">, </text:span><text:span text:style-name="T6">t</text:span><text:span text:style-name="T7">here’s </text:span><text:span text:style-name="T8">nothing</text:span><text:span text:style-name="T7"> wrong with wanting to be an individual. </text:span><text:span text:style-name="T3">The only thing wrong is to </text:span><text:span text:style-name="T6">not </text:span><text:span text:style-name="T3">try.</text:span></text:p>
      <text:p text:style-name="P18"/>
      <text:p text:style-name="P18"><text:span text:style-name="T3">So that’s what I hope to get across here: I’m trying. I tried. </text:span><text:span text:style-name="T6">If I failed, better than those that never pursued a thought to its end.</text:span></text:p>
      <text:p text:style-name="P18"/>
      <text:p text:style-name="P19">Thank you.</text:p>
      <text:p text:style-name="P20"/>
      <text:p text:style-name="P7"/>
      <text:p text:style-name="Text_20_body"/>
      <text:p text:style-name="Text_20_body"/>
      <text:p text:style-name="Text_20_body"/>
      <text:p text:style-name="P21">I aint ever felt better and</text:p>
      <text:p text:style-name="P21">I aint ever been dumbe<text:span text:style-name="T1">r.</text:span></text:p>
      <text:p text:style-name="P22"><text:span text:style-name="T9">—</text:span><text:span text:style-name="T10">Jesse Welles</text:span></text:p>
      <text:p text:style-name="P23"/>
      <text:p text:style-name="P24">To give anything less than your best</text:p>
      <text:p text:style-name="P24">is to sacrifice the gift.</text:p>
      <text:p text:style-name="P25">—<text:span text:style-name="T11">Steve Prefontaine</text:span></text:p>
      <text:p text:style-name="P22"/>
      <text:p text:style-name="P26"><text:span text:style-name="Emphasis">I can’t even guess myself what it must be</text:span></text:p>
      <text:p text:style-name="P26"><text:span text:style-name="Emphasis">to live the life of a human being.</text:span></text:p>
      <text:p text:style-name="P22"><text:span text:style-name="Emphasis"><text:span text:style-name="T12">—</text:span></text:span><text:span text:style-name="Emphasis"><text:span text:style-name="T13">Osamu Dazai, </text:span></text:span><text:span text:style-name="Emphasis"><text:span text:style-name="T14">No Longer Human</text:span></text:span></text:p>
      <text:p text:style-name="P22"><text:span text:style-name="Emphasis"><text:span text:style-name="T14"/></text:span></text:p>
      <text:p text:style-name="P27">See the cat?</text:p>
      <text:p text:style-name="P28"><text:span text:style-name="Emphasis"><text:span text:style-name="T15">See the cradle?</text:span></text:span></text:p>
      <text:p text:style-name="P28"><text:span text:style-name="Emphasis"><text:span text:style-name="T12">—Kurt Vonnegut, Jr., </text:span></text:span><text:span text:style-name="Emphasis"><text:span text:style-name="T15">Cat’s Cradle</text:span></text:span></text:p>
      <text:p text:style-name="P22"><text:span text:style-name="Emphasis"><text:span text:style-name="T13"/></text:span></text:p>
      <text:p text:style-name="P29"><text:span text:style-name="Emphasis"><text:span text:style-name="T16">I don’t want to be normal,</text:span></text:span></text:p>
      <text:p text:style-name="P29"><text:span text:style-name="Emphasis"><text:span text:style-name="T16">I want to be me</text:span></text:span><text:span text:style-name="Emphasis">.</text:span></text:p>
      <text:p text:style-name="P29"><text:span text:style-name="Emphasis"><text:span text:style-name="T13">—</text:span></text:span><text:span text:style-name="Emphasis"><text:span text:style-name="T17">My Brain</text:span></text:span></text:p>
      <text:p text:style-name="P30" loext:marker-style-name="T18"><text:span text:style-name="T18"/></text:p>
      <text:p text:style-name="Text_20_body"/>
      <text:p text:style-name="P31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2">words</text:p>
      <text:p text:style-name="P32"/>
      <text:p text:style-name="P32">Sincerely,</text:p>
      <text:p text:style-name="P32">Vova</text:p>
      <text:p text:style-name="P33"><office:annotation office:name="__Annotation__434_3516834471" loext:resolved="false"><dc:creator>Vladimir Herdman</dc:creator><dc:date>2026-05-09T23:02:11.382157000</dc:date><meta:creator-initials>VTH</meta:creator-initials><text:p text:style-name="P34"><text:span text:style-name="T19">Base off an actual photo of paint splatter or something, people are getting tree/person, and not the intended splatter text effect.</text:span></text:p><text:p text:style-name="P35"><text:span text:style-name="T19"/></text:p></office:annotation>What Have I Done<office:annotation-end office:name="__Annotation__434_3516834471"/></text:p>
      <text:p text:style-name="Poetry_20_Text"/>
      <text:p text:style-name="Poetry_20_Text"><text:s text:c="4"/><text:span text:style-name="T20">to o</text:span> <text:s text:c="72"/><text:span text:style-name="T21">m</text:span></text:p>
      <text:p text:style-name="Poetry_20_Text"><text:span text:style-name="T20">fa t</text:span> <text:s text:c="5"/><text:span text:style-name="T20">a</text:span> <text:s text:c="66"/><text:span text:style-name="T21">y</text:span></text:p>
      <text:p text:style-name="Poetry_20_Text"><text:s text:c="2"/><text:span text:style-name="T20">l</text:span> <text:s text:c="69"/><text:span text:style-name="T21">he <text:s text:c="9"/>l</text:span></text:p>
      <text:p text:style-name="Poetry_20_Text"><text:s text:c="4"/><text:span text:style-name="T20">o</text:span> <text:s text:c="71"/><text:span text:style-name="T21">a <text:s text:c="9"/>a</text:span></text:p>
      <text:p text:style-name="Poetry_20_Text"><text:s text:c="2"/><text:span text:style-name="T20">a</text:span> <text:s text:c="70"/><text:span text:style-name="T21">r <text:s text:c="11"/>s</text:span></text:p>
      <text:p text:style-name="Poetry_20_Text"><text:s text:c="5"/><text:span text:style-name="T20">d</text:span> <text:s text:c="66"/><text:span text:style-name="T21">t <text:s text:c="15"/>t</text:span></text:p>
      <text:p text:style-name="Poetry_20_Text"><text:s text:c="56"/><text:span text:style-name="T21">y <text:s/>go <text:s text:c="28"/></text:span><text:span text:style-name="T20">c</text:span></text:p>
      <text:p text:style-name="Poetry_20_Text"><text:s text:c="21"/><text:span text:style-name="T21">I</text:span> <text:s text:c="24"/><text:span text:style-name="T21">h <text:s/>m <text:s text:c="10"/>d <text:s text:c="26"/>h</text:span></text:p>
      <text:p text:style-name="Poetry_20_Text"><text:s text:c="14"/><text:span text:style-name="T21">e</text:span> <text:s text:c="8"/><text:span text:style-name="T21">od</text:span> <text:s/><text:span text:style-name="T21">t</text:span> <text:s text:c="12"/><text:span text:style-name="T21">o <text:s text:c="43"/>a hn</text:span></text:p>
      <text:p text:style-name="Poetry_20_Text"><text:s text:c="12"/><text:span text:style-name="T21">ev</text:span> <text:s text:c="17"/><text:span text:style-name="T21">ah</text:span> <text:s text:c="33"/><text:span text:style-name="T21">I <text:s text:c="20"/>c <text:s/>e</text:span></text:p>
      <text:p text:style-name="Poetry_20_Text"><text:s text:c="9"/><text:span text:style-name="T21">n</text:span> <text:s text:c="24"/><text:span text:style-name="T21">w</text:span> <text:s text:c="33"/><text:span text:style-name="T21">ca</text:span></text:p>
      <text:p text:style-name="Poetry_20_Text"><text:s text:c="5"/><text:span text:style-name="T21">sa</text:span> <text:s text:c="32"/>w <text:s text:c="29"/><text:span text:style-name="T21">n</text:span></text:p>
      <text:p text:style-name="Poetry_20_Text"><text:s text:c="9"/><text:span text:style-name="T21">y</text:span> <text:s text:c="29"/>e <text:s text:c="37"/><text:span text:style-name="T21">t</text:span></text:p>
      <text:p text:style-name="Poetry_20_Text"><text:s text:c="40"/></text:p>
      <text:p text:style-name="Poetry_20_Text"><text:s text:c="41"/>t <text:s text:c="34"/><text:span text:style-name="T21">fe</text:span></text:p>
      <text:p text:style-name="Poetry_20_Text"><text:s text:c="43"/>a <text:s text:c="35"/><text:span text:style-name="T21">el m</text:span></text:p>
      <text:p text:style-name="Poetry_20_Text"><text:s text:c="45"/>n <text:s text:c="36"/><text:span text:style-name="T21">y l</text:span></text:p>
      <text:p text:style-name="Poetry_20_Text"><text:s text:c="44"/>d <text:s text:c="38"/><text:span text:style-name="T21">e</text:span></text:p>
      <text:p text:style-name="Poetry_20_Text"><text:s text:c="45"/>d <text:s text:c="37"/><text:span text:style-name="T21">g</text:span></text:p>
      <text:p text:style-name="Poetry_20_Text"><text:s text:c="44"/>r</text:p>
      <text:p text:style-name="Poetry_20_Text"><text:s text:c="45"/>i</text:p>
      <text:p text:style-name="Poetry_20_Text"><text:s text:c="46"/>pi n</text:p>
      <text:p text:style-name="Poetry_20_Text"><text:s text:c="50"/>g d o</text:p>
      <text:p text:style-name="Poetry_20_Text"><text:s text:c="41"/><text:span text:style-name="T21">o</text:span> <text:s text:c="11"/>w</text:p>
      <text:p text:style-name="Poetry_20_Text"><text:s text:c="37"/><text:span text:style-name="T21">n</text:span> <text:s text:c="16"/>n th e</text:p>
      <text:p text:style-name="Poetry_20_Text"><text:s text:c="29"/><text:span text:style-name="T21">to</text:span> <text:s text:c="29"/>p</text:p>
      <text:p text:style-name="Poetry_20_Text"><text:s text:c="23"/><text:span text:style-name="T21">th</text:span> <text:s text:c="34"/>a <text:s/>g</text:p>
      <text:p text:style-name="Poetry_20_Text"><text:s text:c="22"/><text:span text:style-name="T21">e</text:span> <text:s text:c="35"/>e <text:s text:c="7"/><text:span text:style-name="T22">a <text:s text:c="4"/>t <text:s text:c="5"/>s e <text:s text:c="2"/>e</text:span></text:p>
      <text:p text:style-name="Poetry_20_Text"><text:s text:c="16"/><text:span text:style-name="T21">flo <text:s/>or</text:span> <text:s text:c="26"/><text:span text:style-name="T22">f or <text:s text:c="7"/>l <text:s text:c="2"/>l <text:s text:c="4"/>o <text:s text:c="5"/>m y <text:s text:c="2"/>sh a <text:s/>me</text:span></text:p>
      <text:p text:style-name="P36">A Conversation In Emoticons</text:p>
      <text:p text:style-name="P37"/>
      <text:p text:style-name="P37">\ (,,-_-,,) /</text:p>
      <text:p text:style-name="P36">Be Normal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8">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3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6">Goodbye Ollie,</text:p>
      <text:p text:style-name="P39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2"/><text:bookmark text:name="PageNumWizard_HEADER_Frontmatter-numbered5 Copy 5 Copy 20"/><text:bookmark text:name="PageNumWizard_HEADER_Frontmatter-numbered5 Copy 5 Copy 18"/><text:bookmark text:name="PageNumWizard_HEADER_Frontmatter-numbered5 Copy 5 Copy 16"/><text:bookmark text:name="PageNumWizard_HEADER_Frontmatter-numbered5 Copy 5 Copy 14"/><text:bookmark text:name="PageNumWizard_HEADER_Frontmatter-numbered5 Copy 5 Copy 12"/><text:bookmark text:name="PageNumWizard_HEADER_Frontmatter-numbered5 Copy 5 Copy 10"/><text:bookmark text:name="PageNumWizard_HEADER_Frontmatter-numbered5 Copy 5 Copy 8"/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text:bookmark text:name="PageNumWizard_HEADER_Frontmatter-numbered5 Copy 5 Copy 7"/><text:bookmark text:name="PageNumWizard_HEADER_Frontmatter-numbered5 Copy 5 Copy 9"/><text:bookmark text:name="PageNumWizard_HEADER_Frontmatter-numbered5 Copy 5 Copy 11"/><text:bookmark text:name="PageNumWizard_HEADER_Frontmatter-numbered5 Copy 5 Copy 13"/><text:bookmark text:name="PageNumWizard_HEADER_Frontmatter-numbered5 Copy 5 Copy 15"/><text:bookmark text:name="PageNumWizard_HEADER_Frontmatter-numbered5 Copy 5 Copy 17"/><text:bookmark text:name="PageNumWizard_HEADER_Frontmatter-numbered5 Copy 5 Copy 19"/><text:bookmark text:name="PageNumWizard_HEADER_Frontmatter-numbered5 Copy 5 Copy 21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6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6-01T23:03:17.519182000</dc:date>
    <meta:editing-duration>PT1H47M1S</meta:editing-duration>
    <meta:editing-cycles>35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6" meta:paragraph-count="111" meta:word-count="958" meta:character-count="6936" meta:non-whitespace-character-count="4092"/>
  </office:meta>
</office:document-meta>
</file>